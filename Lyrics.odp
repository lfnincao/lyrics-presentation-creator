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wiss" style:font-pitch="variable"/>
    <style:font-face style:name="Arial1" svg:font-family="Arial" style:font-family-generic="swiss" style:font-pitch="variable"/>
    <style:font-face style:name="Arial2" svg:font-family="Arial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pitch="variable"/>
    <style:font-face style:name="Calibri2" svg:font-family="Calibri"/>
    <style:font-face style:name="Courier" svg:font-family="Courier" style:font-family-generic="modern" style:font-pitch="variable"/>
    <style:font-face style:name="Courier1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family-generic="swiss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Segoe UI2" svg:font-family="'Segoe UI'" style:font-family-generic="swiss" style:font-pitch="variable"/>
    <style:font-face style:name="Segoe UI3" svg:font-family="'Segoe UI'" style:font-family-generic="modern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ahoma2" svg:font-family="Tahoma" style:font-family-generic="roman" style:font-pitch="variable"/>
    <style:font-face style:name="Tahoma3" svg:font-family="Tahoma" style:font-family-generic="swiss" style:font-pitch="variable"/>
    <style:font-face style:name="Tahoma4" svg:font-family="Tahoma" style:font-family-generic="moder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opacity="100%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aster1-Office-Theme-title">
      <style:graphic-properties draw:auto-grow-height="true" fo:min-height="1.762cm"/>
      <style:paragraph-properties style:writing-mode="lr-tb"/>
    </style:style>
    <style:style style:name="pr2" style:family="presentation" style:parent-style-name="Master1-Office-Theme-subtitle">
      <style:graphic-properties draw:fill-color="#ffffff" draw:textarea-vertical-align="top" fo:min-height="12.4cm"/>
      <style:paragraph-properties style:writing-mode="lr-tb"/>
    </style:style>
    <style:style style:name="pr3" style:family="presentation" style:parent-style-name="Master1-Office-Theme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30pt" fo:font-weight="bold" style:font-size-asian="30pt" style:font-weight-asian="bold" style:font-size-complex="30pt" style:font-weight-complex="bold"/>
    </style:style>
    <style:style style:name="P3" style:family="paragraph">
      <style:paragraph-properties fo:margin-left="0cm" fo:margin-right="0cm" fo:margin-top="0cm" fo:margin-bottom="0.203cm" fo:text-align="start" fo:text-indent="0cm"/>
    </style:style>
    <style:style style:name="P4" style:family="paragraph">
      <loext:graphic-properties draw:fill-color="#ffffff"/>
      <style:paragraph-properties fo:margin-left="0cm" fo:margin-right="0cm" fo:margin-top="0cm" fo:margin-bottom="0.203cm" fo:text-align="start" fo:text-indent="0cm" style:writing-mode="lr-tb"/>
      <style:text-properties fo:font-size="22pt" fo:font-weight="bold" style:font-size-asian="22pt" style:font-weight-asian="bold" style:font-size-complex="22pt" style:font-weight-complex="bold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-color="#ffffff"/>
      <style:paragraph-properties fo:text-align="start" style:writing-mode="lr-tb"/>
      <style:text-properties fo:font-size="22pt" fo:font-weight="bold" style:font-size-asian="22pt" style:font-weight-asian="bold" style:font-size-complex="22pt" style:font-weight-complex="bold"/>
    </style:style>
    <style:style style:name="P7" style:family="paragraph">
      <style:paragraph-properties fo:margin-top="0.152cm" fo:margin-bottom="0cm" fo:text-align="start"/>
    </style:style>
    <style:style style:name="P8" style:family="paragraph">
      <loext:graphic-properties draw:fill-color="#ffffff"/>
      <style:paragraph-properties fo:margin-top="0.152cm" fo:margin-bottom="0cm" fo:text-align="start" style:writing-mode="lr-tb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30pt" fo:font-weight="bold" style:font-size-asian="30pt" style:font-weight-asian="bold" style:font-size-complex="30pt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2" draw:style-name="dp1" draw:master-page-name="Master1-Office-Theme" presentation:presentation-page-layout-name="AL1T0">
        <office:forms form:automatic-focus="false" form:apply-design-mode="false"/>
        <draw:frame presentation:style-name="pr1" draw:text-style-name="P2" draw:layer="layout" svg:width="16.276cm" svg:height="1.762cm" svg:x="1.144cm" svg:y="0.179cm" presentation:class="title" presentation:user-transformed="true">
          <draw:text-box>
            <text:p text:style-name="P1"><text:span text:style-name="T1">Psalm 24: 1, 2, 3</text:span></text:p>
          </draw:text-box>
        </draw:frame>
        <draw:frame presentation:style-name="pr2" draw:text-style-name="P4" draw:layer="layout" svg:width="25.189cm" svg:height="12.4cm" svg:x="1.124cm" svg:y="2.2cm" presentation:class="subtitle" presentation:user-transformed="true">
          <draw:text-box>
            <text:p text:style-name="P3"><text:span text:style-name="T2">1. The LORD is King </text:span><text:span text:style-name="T3">of earth</text:span><text:span text:style-name="T2"/><text:span text:style-name="T3">'</text:span><text:span text:style-name="T2"/><text:span text:style-name="T3">s</text:span><text:span text:style-name="T2"> domain,</text:span></text:p>
            <text:p text:style-name="P3"><text:span text:style-name="T2">the </text:span><text:span text:style-name="T3">world and all that dwell there</text:span><text:span text:style-name="T2">in.</text:span></text:p>
            <text:p text:style-name="P3"><text:span text:style-name="T2">Re</text:span><text:span text:style-name="T3">joice, O Zion</text:span><text:span text:style-name="T2"/><text:span text:style-name="T3">'</text:span><text:span text:style-name="T2"/><text:span text:style-name="T3">s sons and</text:span><text:span text:style-name="T2"> daughters,</text:span></text:p>
            <text:p text:style-name="P3"><text:span text:style-name="T2">for </text:span><text:span text:style-name="T3">it stands</text:span><text:span text:style-name="T2"> firm </text:span><text:span text:style-name="T3">by his</text:span><text:span text:style-name="T2"> decrees;</text:span></text:p>
            <text:p text:style-name="P3"><text:span text:style-name="T2">he </text:span><text:span text:style-name="T3">founded it up</text:span><text:span text:style-name="T2">on the seas,</text:span></text:p>
            <text:p text:style-name="P3"><text:span text:style-name="T2">es</text:span><text:span text:style-name="T3">tablished it upon</text:span><text:span text:style-name="T2"> </text:span><text:span text:style-name="T3">the</text:span><text:span text:style-name="T2"> waters.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aster1-Office-Theme" presentation:presentation-page-layout-name="AL1T0">
        <office:forms form:automatic-focus="false" form:apply-design-mode="false"/>
        <draw:frame presentation:style-name="pr1" draw:text-style-name="P2" draw:layer="layout" svg:width="16.276cm" svg:height="1.762cm" svg:x="1.144cm" svg:y="0.179cm" presentation:class="title" presentation:user-transformed="true">
          <draw:text-box>
            <text:p text:style-name="P1"><text:span text:style-name="T1">Psalm 24: 1, 2, 3</text:span></text:p>
          </draw:text-box>
        </draw:frame>
        <draw:frame presentation:style-name="pr2" draw:text-style-name="P4" draw:layer="layout" svg:width="25.189cm" svg:height="12.4cm" svg:x="1.124cm" svg:y="2.2cm" presentation:class="subtitle" presentation:user-transformed="true">
          <draw:text-box>
            <text:p text:style-name="P3"><text:span text:style-name="T2">2. Who shall ascend </text:span><text:span text:style-name="T3">the hill </text:span><text:span text:style-name="T2">of God,</text:span></text:p>
            <text:p text:style-name="P3"><text:span text:style-name="T2">stand </text:span><text:span text:style-name="T3">in his holy place, and </text:span><text:span text:style-name="T2">laud</text:span></text:p>
            <text:p text:style-name="P3"><text:span text:style-name="T2">the </text:span><text:span text:style-name="T3">LORD who lives and reigns for</text:span><text:span text:style-name="T2">ever?</text:span></text:p>
            <text:p text:style-name="P3"><text:span text:style-name="T2">He </text:span><text:span text:style-name="T3">who with</text:span><text:span text:style-name="T2">stands </text:span><text:span text:style-name="T3">the wick</text:span><text:span text:style-name="T2">ed's lure,</text:span></text:p>
            <text:p text:style-name="P3"><text:span text:style-name="T2">whose </text:span><text:span text:style-name="T3">hands are clean, whose </text:span><text:span text:style-name="T2">heart is pure,</text:span></text:p>
            <text:p text:style-name="P3"><text:span text:style-name="T2">who </text:span><text:span text:style-name="T3">keeps his oaths and does not </text:span><text:span text:style-name="T2">waver.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aster1-Office-Theme" presentation:presentation-page-layout-name="AL1T0">
        <office:forms form:automatic-focus="false" form:apply-design-mode="false"/>
        <draw:frame presentation:style-name="pr1" draw:text-style-name="P2" draw:layer="layout" svg:width="16.276cm" svg:height="1.762cm" svg:x="1.144cm" svg:y="0.179cm" presentation:class="title" presentation:user-transformed="true">
          <draw:text-box>
            <text:p text:style-name="P1"><text:span text:style-name="T1">Psalm 24: 1, 2, 3</text:span></text:p>
          </draw:text-box>
        </draw:frame>
        <draw:frame presentation:style-name="pr2" draw:text-style-name="P4" draw:layer="layout" svg:width="25.189cm" svg:height="12.4cm" svg:x="1.124cm" svg:y="2.2cm" presentation:class="subtitle" presentation:user-transformed="true">
          <draw:text-box>
            <text:p text:style-name="P3"><text:span text:style-name="T2">3. Rich blessings shall </text:span><text:span text:style-name="T3">be his </text:span><text:span text:style-name="T2">reward,</text:span></text:p>
            <text:p text:style-name="P3"><text:span text:style-name="T2">and </text:span><text:span text:style-name="T3">vindication from the </text:span><text:span text:style-name="T2">LORD,</text:span></text:p>
            <text:p text:style-name="P3"><text:span text:style-name="T2">who </text:span><text:span text:style-name="T3">is the rock of his sal</text:span><text:span text:style-name="T2">vation.</text:span></text:p>
            <text:p text:style-name="P3"><text:span text:style-name="T2">Such </text:span><text:span text:style-name="T3">are all </text:span><text:span text:style-name="T2">those </text:span><text:span text:style-name="T3">who seek </text:span><text:span text:style-name="T2">his face.</text:span></text:p>
            <text:p text:style-name="P3"><text:span text:style-name="T2">O </text:span><text:span text:style-name="T3">God of Jacob</text:span><text:span text:style-name="T2">, God of grace,</text:span></text:p>
            <text:p text:style-name="P3"><text:span text:style-name="T2">from </text:span><text:span text:style-name="T3">you is all their expec</text:span><text:span text:style-name="T2">tation.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aster1-Office-Theme" presentation:presentation-page-layout-name="AL1T0">
        <office:forms form:automatic-focus="false" form:apply-design-mode="false"/>
        <draw:frame presentation:style-name="pr1" draw:text-style-name="P2" draw:layer="layout" svg:width="16.276cm" svg:height="1.762cm" svg:x="1.144cm" svg:y="0.179cm" presentation:class="title" presentation:user-transformed="true">
          <draw:text-box>
            <text:p text:style-name="P1"><text:span text:style-name="T1">Psalm 139: 1, 2, 13</text:span></text:p>
          </draw:text-box>
        </draw:frame>
        <draw:frame presentation:style-name="pr2" draw:text-style-name="P4" draw:layer="layout" svg:width="25.189cm" svg:height="12.4cm" svg:x="1.124cm" svg:y="2.2cm" presentation:class="subtitle" presentation:user-transformed="true">
          <draw:text-box>
            <text:p text:style-name="P3"><text:span text:style-name="T2">1. LORD, you have </text:span><text:span text:style-name="T3">searched me, heart and</text:span><text:span text:style-name="T2"> soul.</text:span></text:p>
            <text:p text:style-name="P3"><text:span text:style-name="T2">My </text:span><text:span text:style-name="T3">inmost</text:span><text:span text:style-name="T2"> thoughts, you </text:span><text:span text:style-name="T3">know them</text:span><text:span text:style-name="T2"> all.</text:span></text:p>
            <text:p text:style-name="P3"><text:span text:style-name="T2">When I sit </text:span><text:span text:style-name="T3">down and</text:span><text:span text:style-name="T2"> when I rise</text:span></text:p>
            <text:p text:style-name="P3"><text:span text:style-name="T2">you </text:span><text:span text:style-name="T3">see me with</text:span><text:span text:style-name="T2"> your watch</text:span><text:span text:style-name="T3">ful</text:span><text:span text:style-name="T2"> eyes,</text:span></text:p>
            <text:p text:style-name="P3"><text:span text:style-name="T2">and from a</text:span><text:span text:style-name="T3">far your keen dis</text:span><text:span text:style-name="T2">cerning</text:span></text:p>
            <text:p text:style-name="P3"><text:span text:style-name="T2">reveals to </text:span><text:span text:style-name="T3">you my hopes</text:span><text:span text:style-name="T2"> and </text:span><text:span text:style-name="T3">yearn</text:span><text:span text:style-name="T2">ings.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aster1-Office-Theme" presentation:presentation-page-layout-name="AL1T0">
        <office:forms form:automatic-focus="false" form:apply-design-mode="false"/>
        <draw:frame presentation:style-name="pr1" draw:text-style-name="P2" draw:layer="layout" svg:width="16.276cm" svg:height="1.762cm" svg:x="1.144cm" svg:y="0.179cm" presentation:class="title" presentation:user-transformed="true">
          <draw:text-box>
            <text:p text:style-name="P1"><text:span text:style-name="T1">Psalm 139: 1, 2, 13</text:span></text:p>
          </draw:text-box>
        </draw:frame>
        <draw:frame presentation:style-name="pr2" draw:text-style-name="P4" draw:layer="layout" svg:width="25.189cm" svg:height="12.4cm" svg:x="1.124cm" svg:y="2.2cm" presentation:class="subtitle" presentation:user-transformed="true">
          <draw:text-box>
            <text:p text:style-name="P3"><text:span text:style-name="T2">2. You trace my </text:span><text:span text:style-name="T3">steps and day by </text:span><text:span text:style-name="T2">day</text:span></text:p>
            <text:p text:style-name="P3"><text:span text:style-name="T2">see </text:span><text:span text:style-name="T3">me at </text:span><text:span text:style-name="T2">rest or </text:span><text:span text:style-name="T3">on my </text:span><text:span text:style-name="T2">way.</text:span></text:p>
            <text:p text:style-name="P3"><text:span text:style-name="T2">The paths I </text:span><text:span text:style-name="T3">take are </text:span><text:span text:style-name="T2">known to you,</text:span></text:p>
            <text:p text:style-name="P3"><text:span text:style-name="T2">for </text:span><text:span text:style-name="T3">you watch eve</text:span><text:span text:style-name="T2">rything </text:span><text:span text:style-name="T3">I </text:span><text:span text:style-name="T2">do.</text:span></text:p>
            <text:p text:style-name="P3"><text:span text:style-name="T2">Before my </text:span><text:span text:style-name="T3">tongue one word can </text:span><text:span text:style-name="T2">mention</text:span></text:p>
            <text:p text:style-name="P3"><text:span text:style-name="T2">you are a</text:span><text:span text:style-name="T3">ware of my </text:span><text:span text:style-name="T2">in</text:span><text:span text:style-name="T3">ten</text:span><text:span text:style-name="T2">tions.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aster1-Office-Theme" presentation:presentation-page-layout-name="AL1T0">
        <office:forms form:automatic-focus="false" form:apply-design-mode="false"/>
        <draw:frame presentation:style-name="pr1" draw:text-style-name="P2" draw:layer="layout" svg:width="16.276cm" svg:height="1.762cm" svg:x="1.144cm" svg:y="0.179cm" presentation:class="title" presentation:user-transformed="true">
          <draw:text-box>
            <text:p text:style-name="P1"><text:span text:style-name="T1">Psalm 139: 1, 2, 13</text:span></text:p>
          </draw:text-box>
        </draw:frame>
        <draw:frame presentation:style-name="pr2" draw:text-style-name="P4" draw:layer="layout" svg:width="25.189cm" svg:height="12.4cm" svg:x="1.124cm" svg:y="2.2cm" presentation:class="subtitle" presentation:user-transformed="true">
          <draw:text-box>
            <text:p text:style-name="P3"><text:span text:style-name="T2">13. Search me, O </text:span><text:span text:style-name="T3">God, and know my </text:span><text:span text:style-name="T2">heart;</text:span></text:p>
            <text:p text:style-name="P3"><text:span text:style-name="T2">see </text:span><text:span text:style-name="T3">if I </text:span><text:span text:style-name="T2">from your </text:span><text:span text:style-name="T3">ways de</text:span><text:span text:style-name="T2">part.</text:span></text:p>
            <text:p text:style-name="P3"><text:span text:style-name="T2">LORD, probe my </text:span><text:span text:style-name="T3">every </text:span><text:span text:style-name="T2">anxious thought</text:span></text:p>
            <text:p text:style-name="P3"><text:span text:style-name="T2">and </text:span><text:span text:style-name="T3">let me by </text:span><text:span text:style-name="T2">your word </text:span><text:span text:style-name="T3">be </text:span><text:span text:style-name="T2">taught.</text:span></text:p>
            <text:p text:style-name="P3"><text:span text:style-name="T2">Help me walk </text:span><text:span text:style-name="T3">on where you are </text:span><text:span text:style-name="T2">leading,</text:span></text:p>
            <text:p text:style-name="P3"><text:span text:style-name="T2">in ever</text:span><text:span text:style-name="T3">lasting ways </text:span><text:span text:style-name="T2">pro</text:span><text:span text:style-name="T3">ceed</text:span><text:span text:style-name="T2">ing.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aster1-Office-Theme" presentation:presentation-page-layout-name="AL1T0">
        <office:forms form:automatic-focus="false" form:apply-design-mode="false"/>
        <draw:frame presentation:style-name="pr1" draw:text-style-name="P2" draw:layer="layout" svg:width="16.276cm" svg:height="1.762cm" svg:x="1.144cm" svg:y="0.179cm" presentation:class="title" presentation:user-transformed="true">
          <draw:text-box>
            <text:p text:style-name="P1"><text:span text:style-name="T1">Psalm 5: 1, 2, 4, 5, 9</text:span></text:p>
          </draw:text-box>
        </draw:frame>
        <draw:frame presentation:style-name="pr2" draw:text-style-name="P4" draw:layer="layout" svg:width="25.189cm" svg:height="12.4cm" svg:x="1.124cm" svg:y="2.2cm" presentation:class="subtitle" presentation:user-transformed="true">
          <draw:text-box>
            <text:p text:style-name="P3"><text:span text:style-name="T2">1. </text:span><text:span text:style-name="T3">O hear my</text:span><text:span text:style-name="T2"> words of </text:span><text:span text:style-name="T3">lamen</text:span><text:span text:style-name="T2">tation;</text:span></text:p>
            <text:p text:style-name="P3"><text:span text:style-name="T2">LORD, </text:span><text:span text:style-name="T3">pay attention</text:span><text:span text:style-name="T2"> to my sighs.</text:span></text:p>
            <text:p text:style-name="P3"><text:span text:style-name="T2">My </text:span><text:span text:style-name="T3">God and King, re</text:span><text:span text:style-name="T2">gard my cries.</text:span></text:p>
            <text:p text:style-name="P3"><text:span text:style-name="T2">To </text:span><text:span text:style-name="T3">you I</text:span><text:span text:style-name="T2"> turn in </text:span><text:span text:style-name="T3">medi</text:span><text:span text:style-name="T2">tation.</text:span></text:p>
            <text:p text:style-name="P3"><text:span text:style-name="T2">Grant </text:span><text:span text:style-name="T3">conso</text:span><text:span text:style-name="T2">lation! </text:span></text:p>
            <text:p text:style-name="P3"><text:span text:style-name="T2"/></text:p>
            <text:p text:style-name="P3"><text:span text:style-name="T2">2. At </text:span><text:span text:style-name="T3">sunrise </text:span><text:span text:style-name="T2">hear my </text:span><text:span text:style-name="T3">suppli</text:span><text:span text:style-name="T2">cation;</text:span></text:p>
            <text:p text:style-name="P3"><text:span text:style-name="T2">O </text:span><text:span text:style-name="T3">LORD, I seek your </text:span><text:span text:style-name="T2">help and grace.</text:span></text:p>
            <text:p text:style-name="P3"><text:span text:style-name="T2">At </text:span><text:span text:style-name="T3">break of day I </text:span><text:span text:style-name="T2">plead my case</text:span></text:p>
            <text:p text:style-name="P3"><text:span text:style-name="T2">and </text:span><text:span text:style-name="T3">wait in </text:span><text:span text:style-name="T2">eager </text:span><text:span text:style-name="T3">expec</text:span><text:span text:style-name="T2">tation</text:span></text:p>
            <text:p text:style-name="P3"><text:span text:style-name="T2">for </text:span><text:span text:style-name="T3">vindi</text:span><text:span text:style-name="T2">cation.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aster1-Office-Theme" presentation:presentation-page-layout-name="AL1T0">
        <office:forms form:automatic-focus="false" form:apply-design-mode="false"/>
        <draw:frame presentation:style-name="pr1" draw:text-style-name="P2" draw:layer="layout" svg:width="16.276cm" svg:height="1.762cm" svg:x="1.144cm" svg:y="0.179cm" presentation:class="title" presentation:user-transformed="true">
          <draw:text-box>
            <text:p text:style-name="P1"><text:span text:style-name="T1">Psalm 5: 1, 2, 4, 5, 9</text:span></text:p>
          </draw:text-box>
        </draw:frame>
        <draw:frame presentation:style-name="pr2" draw:text-style-name="P4" draw:layer="layout" svg:width="25.189cm" svg:height="12.4cm" svg:x="1.124cm" svg:y="2.2cm" presentation:class="subtitle" presentation:user-transformed="true">
          <draw:text-box>
            <text:p text:style-name="P3"><text:span text:style-name="T2">4. When </text:span><text:span text:style-name="T3">led in</text:span><text:span text:style-name="T2">to your </text:span><text:span text:style-name="T3">habi</text:span><text:span text:style-name="T2">tation</text:span></text:p>
            <text:p text:style-name="P3"><text:span text:style-name="T2">through </text:span><text:span text:style-name="T3">your abundant </text:span><text:span text:style-name="T2">love and grace,</text:span></text:p>
            <text:p text:style-name="P3"><text:span text:style-name="T2">I </text:span><text:span text:style-name="T3">will bow down be</text:span><text:span text:style-name="T2">fore your face</text:span></text:p>
            <text:p text:style-name="P3"><text:span text:style-name="T2">and </text:span><text:span text:style-name="T3">plead in </text:span><text:span text:style-name="T2">awe-filled </text:span><text:span text:style-name="T3">ado</text:span><text:span text:style-name="T2">ration</text:span></text:p>
            <text:p text:style-name="P3"><text:span text:style-name="T2">for </text:span><text:span text:style-name="T3">preser</text:span><text:span text:style-name="T2">vation. </text:span></text:p>
            <text:p text:style-name="P3"><text:span text:style-name="T2"/></text:p>
            <text:p text:style-name="P3"><text:span text:style-name="T2">5. Up</text:span><text:span text:style-name="T3">hold me, </text:span><text:span text:style-name="T2">LORD! With </text:span><text:span text:style-name="T3">aid pro</text:span><text:span text:style-name="T2">vide me;</text:span></text:p>
            <text:p text:style-name="P3"><text:span text:style-name="T2">my </text:span><text:span text:style-name="T3">enemies are </text:span><text:span text:style-name="T2">numberless.</text:span></text:p>
            <text:p text:style-name="P3"><text:span text:style-name="T2">Lead </text:span><text:span text:style-name="T3">me in paths of </text:span><text:span text:style-name="T2">righteousness.</text:span></text:p>
            <text:p text:style-name="P3"><text:span text:style-name="T2">Make </text:span><text:span text:style-name="T3">straight your </text:span><text:span text:style-name="T2">way and </text:span><text:span text:style-name="T3">safely </text:span><text:span text:style-name="T2">guide me;</text:span></text:p>
            <text:p text:style-name="P3"><text:span text:style-name="T2">LORD, </text:span><text:span text:style-name="T3">walk be</text:span><text:span text:style-name="T2">side me.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aster1-Office-Theme" presentation:presentation-page-layout-name="AL1T0">
        <office:forms form:automatic-focus="false" form:apply-design-mode="false"/>
        <draw:frame presentation:style-name="pr1" draw:text-style-name="P2" draw:layer="layout" svg:width="16.276cm" svg:height="1.762cm" svg:x="1.144cm" svg:y="0.179cm" presentation:class="title" presentation:user-transformed="true">
          <draw:text-box>
            <text:p text:style-name="P1"><text:span text:style-name="T1">Psalm 5: 1, 2, 4, 5, 9</text:span></text:p>
          </draw:text-box>
        </draw:frame>
        <draw:frame presentation:style-name="pr2" draw:text-style-name="P4" draw:layer="layout" svg:width="25.189cm" svg:height="12.4cm" svg:x="1.124cm" svg:y="2.2cm" presentation:class="subtitle" presentation:user-transformed="true">
          <draw:text-box>
            <text:p text:style-name="P3"><text:span text:style-name="T2">9. O </text:span><text:span text:style-name="T3">LORD, with </text:span><text:span text:style-name="T2">your pro</text:span><text:span text:style-name="T3">tection </text:span><text:span text:style-name="T2">cover</text:span></text:p>
            <text:p text:style-name="P3"><text:span text:style-name="T2">all </text:span><text:span text:style-name="T3">those who love your </text:span><text:span text:style-name="T2">holy name,</text:span></text:p>
            <text:p text:style-name="P3"><text:span text:style-name="T2">that </text:span><text:span text:style-name="T3">they with joy may </text:span><text:span text:style-name="T2">spread your fame.</text:span></text:p>
            <text:p text:style-name="P3"><text:span text:style-name="T2">You </text:span><text:span text:style-name="T3">bless the </text:span><text:span text:style-name="T2">just and </text:span><text:span text:style-name="T3">with your </text:span><text:span text:style-name="T2">favour</text:span></text:p>
            <text:p text:style-name="P3"><text:span text:style-name="T2">shield </text:span><text:span text:style-name="T3">them for</text:span><text:span text:style-name="T2">ever.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aster1-Office-Theme" presentation:presentation-page-layout-name="AL1T0">
        <office:forms form:automatic-focus="false" form:apply-design-mode="false"/>
        <draw:frame presentation:style-name="pr1" draw:text-style-name="P2" draw:layer="layout" svg:width="16.276cm" svg:height="1.762cm" svg:x="1.144cm" svg:y="0.179cm" presentation:class="title" presentation:user-transformed="true">
          <draw:text-box>
            <text:p text:style-name="P1"><text:span text:style-name="T1">Hymn 7: 1, 2, 3, 4</text:span></text:p>
          </draw:text-box>
        </draw:frame>
        <draw:frame presentation:style-name="pr2" draw:text-style-name="P4" draw:layer="layout" svg:width="25.189cm" svg:height="12.4cm" svg:x="1.124cm" svg:y="2.2cm" presentation:class="subtitle" presentation:user-transformed="true">
          <draw:text-box>
            <text:p text:style-name="P3"><text:span text:style-name="T2">1. Glory be to God the Father,</text:span></text:p>
            <text:p text:style-name="P3"><text:span text:style-name="T2">glory be to God the Son,</text:span></text:p>
            <text:p text:style-name="P3"><text:span text:style-name="T2">glory be to God the Spirit,</text:span></text:p>
            <text:p text:style-name="P3"><text:span text:style-name="T2">God Almighty, Three in One!</text:span></text:p>
            <text:p text:style-name="P3"><text:span text:style-name="T2">Hallelujah, hallelujah!</text:span></text:p>
            <text:p text:style-name="P3"><text:span text:style-name="T2">Glory be to him alone!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aster1-Office-Theme" presentation:presentation-page-layout-name="AL1T0">
        <office:forms form:automatic-focus="false" form:apply-design-mode="false"/>
        <draw:frame presentation:style-name="pr1" draw:text-style-name="P2" draw:layer="layout" svg:width="16.276cm" svg:height="1.762cm" svg:x="1.144cm" svg:y="0.179cm" presentation:class="title" presentation:user-transformed="true">
          <draw:text-box>
            <text:p text:style-name="P1"><text:span text:style-name="T1">Hymn 7: 1, 2, 3, 4</text:span></text:p>
          </draw:text-box>
        </draw:frame>
        <draw:frame presentation:style-name="pr2" draw:text-style-name="P4" draw:layer="layout" svg:width="25.189cm" svg:height="12.4cm" svg:x="1.124cm" svg:y="2.2cm" presentation:class="subtitle" presentation:user-transformed="true">
          <draw:text-box>
            <text:p text:style-name="P3"><text:span text:style-name="T2">2. Glory be to him who loved us,</text:span></text:p>
            <text:p text:style-name="P3"><text:span text:style-name="T2">washed us from all sin and stain!</text:span></text:p>
            <text:p text:style-name="P3"><text:span text:style-name="T2">Glory be to him who bought us,</text:span></text:p>
            <text:p text:style-name="P3"><text:span text:style-name="T2">made us kings with him to reign!</text:span></text:p>
            <text:p text:style-name="P3"><text:span text:style-name="T2">Hallelujah, hallelujah!</text:span></text:p>
            <text:p text:style-name="P3"><text:span text:style-name="T2">Praise the Lamb that once was slain!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aster1-Office-Theme" presentation:presentation-page-layout-name="AL1T0">
        <office:forms form:automatic-focus="false" form:apply-design-mode="false"/>
        <draw:frame presentation:style-name="pr1" draw:text-style-name="P2" draw:layer="layout" svg:width="16.276cm" svg:height="1.762cm" svg:x="1.144cm" svg:y="0.179cm" presentation:class="title" presentation:user-transformed="true">
          <draw:text-box>
            <text:p text:style-name="P1"><text:span text:style-name="T1">Hymn 7: 1, 2, 3, 4</text:span></text:p>
          </draw:text-box>
        </draw:frame>
        <draw:frame presentation:style-name="pr2" draw:text-style-name="P4" draw:layer="layout" svg:width="25.189cm" svg:height="12.4cm" svg:x="1.124cm" svg:y="2.2cm" presentation:class="subtitle" presentation:user-transformed="true">
          <draw:text-box>
            <text:p text:style-name="P3"><text:span text:style-name="T2">3. Glory to the King of angels,</text:span></text:p>
            <text:p text:style-name="P3"><text:span text:style-name="T2">glory to the church's King,</text:span></text:p>
            <text:p text:style-name="P3"><text:span text:style-name="T2">glory to the King of nations!</text:span></text:p>
            <text:p text:style-name="P3"><text:span text:style-name="T2">Heaven and earth, your praises bring.</text:span></text:p>
            <text:p text:style-name="P3"><text:span text:style-name="T2">Hallelujah, hallelujah!</text:span></text:p>
            <text:p text:style-name="P3"><text:span text:style-name="T2">To the King of glory sing!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aster1-Office-Theme" presentation:presentation-page-layout-name="AL1T0">
        <office:forms form:automatic-focus="false" form:apply-design-mode="false"/>
        <draw:frame presentation:style-name="pr1" draw:text-style-name="P2" draw:layer="layout" svg:width="16.276cm" svg:height="1.762cm" svg:x="1.144cm" svg:y="0.179cm" presentation:class="title" presentation:user-transformed="true">
          <draw:text-box>
            <text:p text:style-name="P1"><text:span text:style-name="T1">Hymn 7: 1, 2, 3, 4</text:span></text:p>
          </draw:text-box>
        </draw:frame>
        <draw:frame presentation:style-name="pr2" draw:text-style-name="P4" draw:layer="layout" svg:width="25.189cm" svg:height="12.4cm" svg:x="1.124cm" svg:y="2.2cm" presentation:class="subtitle" presentation:user-transformed="true">
          <draw:text-box>
            <text:p text:style-name="P3"><text:span text:style-name="T2">4. "Glory, blessing, praise eternal!"</text:span></text:p>
            <text:p text:style-name="P3"><text:span text:style-name="T2">Thus the choir of angels sings.</text:span></text:p>
            <text:p text:style-name="P3"><text:span text:style-name="T2">"Honour, glory, power, dominion!"</text:span></text:p>
            <text:p text:style-name="P3"><text:span text:style-name="T2">Thus its praise creation brings.</text:span></text:p>
            <text:p text:style-name="P3"><text:span text:style-name="T2">Hallelujah, hallelujah!</text:span></text:p>
            <text:p text:style-name="P3"><text:span text:style-name="T2">Praise the mighty King of kings!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aster1-Office-Theme" presentation:presentation-page-layout-name="AL1T0">
        <office:forms form:automatic-focus="false" form:apply-design-mode="false"/>
        <draw:frame presentation:style-name="pr1" draw:text-style-name="P2" draw:layer="layout" svg:width="16.276cm" svg:height="1.762cm" svg:x="1.144cm" svg:y="0.179cm" presentation:class="title" presentation:user-transformed="true">
          <draw:text-box>
            <text:p text:style-name="P1"><text:span text:style-name="T1">Hymn 29: 1, 2, 3</text:span></text:p>
          </draw:text-box>
        </draw:frame>
        <draw:frame presentation:style-name="pr2" draw:text-style-name="P4" draw:layer="layout" svg:width="25.189cm" svg:height="12.4cm" svg:x="1.124cm" svg:y="2.2cm" presentation:class="subtitle" presentation:user-transformed="true">
          <draw:text-box>
            <text:p text:style-name="P3"><text:span text:style-name="T2">1. All glory, laud, and honour</text:span></text:p>
            <text:p text:style-name="P3"><text:span text:style-name="T2">to thee, Redeemer, King,</text:span></text:p>
            <text:p text:style-name="P3"><text:span text:style-name="T2">to whom the lips of children</text:span></text:p>
            <text:p text:style-name="P3"><text:span text:style-name="T2">made loud hosannas ring.</text:span></text:p>
            <text:p text:style-name="P3"><text:span text:style-name="T2">Thou art the King of Israel,</text:span></text:p>
            <text:p text:style-name="P3"><text:span text:style-name="T2">thou, David's royal Son,</text:span></text:p>
            <text:p text:style-name="P3"><text:span text:style-name="T2">who in the Lord's name comest,</text:span></text:p>
            <text:p text:style-name="P3"><text:span text:style-name="T2">the King and Blessèd One.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aster1-Office-Theme" presentation:presentation-page-layout-name="AL1T0">
        <office:forms form:automatic-focus="false" form:apply-design-mode="false"/>
        <draw:frame presentation:style-name="pr1" draw:text-style-name="P2" draw:layer="layout" svg:width="16.276cm" svg:height="1.762cm" svg:x="1.144cm" svg:y="0.179cm" presentation:class="title" presentation:user-transformed="true">
          <draw:text-box>
            <text:p text:style-name="P1"><text:span text:style-name="T1">Hymn 29: 1, 2, 3</text:span></text:p>
          </draw:text-box>
        </draw:frame>
        <draw:frame presentation:style-name="pr2" draw:text-style-name="P4" draw:layer="layout" svg:width="25.189cm" svg:height="12.4cm" svg:x="1.124cm" svg:y="2.2cm" presentation:class="subtitle" presentation:user-transformed="true">
          <draw:text-box>
            <text:p text:style-name="P3"><text:span text:style-name="T2">2. The multitudes of angels</text:span></text:p>
            <text:p text:style-name="P3"><text:span text:style-name="T2">are praising thee on high;</text:span></text:p>
            <text:p text:style-name="P3"><text:span text:style-name="T2">let man and all creation</text:span></text:p>
            <text:p text:style-name="P3"><text:span text:style-name="T2">to them with joy reply.</text:span></text:p>
            <text:p text:style-name="P3"><text:span text:style-name="T2">The people near Jerusalem</text:span></text:p>
            <text:p text:style-name="P3"><text:span text:style-name="T2">with palms before thee went;</text:span></text:p>
            <text:p text:style-name="P3"><text:span text:style-name="T2">our praise and prayer and anthems</text:span></text:p>
            <text:p text:style-name="P3"><text:span text:style-name="T2">before thee we present.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aster1-Office-Theme" presentation:presentation-page-layout-name="AL1T0">
        <office:forms form:automatic-focus="false" form:apply-design-mode="false"/>
        <draw:frame presentation:style-name="pr1" draw:text-style-name="P2" draw:layer="layout" svg:width="16.276cm" svg:height="1.762cm" svg:x="1.144cm" svg:y="0.179cm" presentation:class="title" presentation:user-transformed="true">
          <draw:text-box>
            <text:p text:style-name="P1"><text:span text:style-name="T1">Hymn 29: 1, 2, 3</text:span></text:p>
          </draw:text-box>
        </draw:frame>
        <draw:frame presentation:style-name="pr2" draw:text-style-name="P4" draw:layer="layout" svg:width="25.189cm" svg:height="12.4cm" svg:x="1.124cm" svg:y="2.2cm" presentation:class="subtitle" presentation:user-transformed="true">
          <draw:text-box>
            <text:p text:style-name="P3"><text:span text:style-name="T2">3. To thee before thy passion</text:span></text:p>
            <text:p text:style-name="P3"><text:span text:style-name="T2">they sang their hymns of praise;</text:span></text:p>
            <text:p text:style-name="P3"><text:span text:style-name="T2">to thee, now high exalted,</text:span></text:p>
            <text:p text:style-name="P3"><text:span text:style-name="T2">our melody we raise.</text:span></text:p>
            <text:p text:style-name="P3"><text:span text:style-name="T2">Thou didst accept their praises;</text:span></text:p>
            <text:p text:style-name="P3"><text:span text:style-name="T2">accept the prayers we bring,</text:span></text:p>
            <text:p text:style-name="P3"><text:span text:style-name="T2">who in all good delightest,</text:span></text:p>
            <text:p text:style-name="P3"><text:span text:style-name="T2">thou good and gracious King.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aster1-Office-Theme" presentation:presentation-page-layout-name="AL1T0">
        <office:forms form:automatic-focus="false" form:apply-design-mode="false"/>
        <draw:frame presentation:style-name="pr1" draw:text-style-name="P2" draw:layer="layout" svg:width="16.276cm" svg:height="1.762cm" svg:x="1.144cm" svg:y="0.179cm" presentation:class="title" presentation:user-transformed="true">
          <draw:text-box>
            <text:p text:style-name="P1"><text:span text:style-name="T1"/></text:p>
          </draw:text-box>
        </draw:frame>
        <draw:frame presentation:style-name="pr2" draw:text-style-name="P4" draw:layer="layout" svg:width="25.189cm" svg:height="12.4cm" svg:x="1.124cm" svg:y="2.2cm" presentation:class="subtitl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aster1-Office-Theme" presentation:presentation-page-layout-name="AL1T0">
        <office:forms form:automatic-focus="false" form:apply-design-mode="false"/>
        <draw:frame presentation:style-name="pr1" draw:text-style-name="P2" draw:layer="layout" svg:width="16.276cm" svg:height="1.762cm" svg:x="1.144cm" svg:y="0.179cm" presentation:class="title" presentation:user-transformed="true">
          <draw:text-box>
            <text:p text:style-name="P1"><text:span text:style-name="T1">Psalm 135: 1, 2, 5, 6</text:span></text:p>
          </draw:text-box>
        </draw:frame>
        <draw:frame presentation:style-name="pr2" draw:text-style-name="P4" draw:layer="layout" svg:width="25.189cm" svg:height="12.4cm" svg:x="1.124cm" svg:y="2.2cm" presentation:class="subtitle" presentation:user-transformed="true">
          <draw:text-box>
            <text:p text:style-name="P3"><text:span text:style-name="T2">1. Halle</text:span><text:span text:style-name="T3">lujah! Praise the</text:span><text:span text:style-name="T2"> LORD</text:span></text:p>
            <text:p text:style-name="P3"><text:span text:style-name="T2">and ex</text:span><text:span text:style-name="T3">alt his</text:span><text:span text:style-name="T2"> holy name.</text:span></text:p>
            <text:p text:style-name="P3"><text:span text:style-name="T2">You that </text:span><text:span text:style-name="T3">serve within his</text:span><text:span text:style-name="T2"> house,</text:span></text:p>
            <text:p text:style-name="P3"><text:span text:style-name="T2">praise his </text:span><text:span text:style-name="T3">greatness, voice his</text:span><text:span text:style-name="T2"> fame.</text:span></text:p>
            <text:p text:style-name="P3"><text:span text:style-name="T2">You his </text:span><text:span text:style-name="T3">servants, shout his</text:span><text:span text:style-name="T2"> laud</text:span></text:p>
            <text:p text:style-name="P3"><text:span text:style-name="T2">in the </text:span><text:span text:style-name="T3">temple</text:span><text:span text:style-name="T2"> courts of God.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aster1-Office-Theme" presentation:presentation-page-layout-name="AL1T0">
        <office:forms form:automatic-focus="false" form:apply-design-mode="false"/>
        <draw:frame presentation:style-name="pr1" draw:text-style-name="P2" draw:layer="layout" svg:width="16.276cm" svg:height="1.762cm" svg:x="1.144cm" svg:y="0.179cm" presentation:class="title" presentation:user-transformed="true">
          <draw:text-box>
            <text:p text:style-name="P1"><text:span text:style-name="T1">Psalm 135: 1, 2, 5, 6</text:span></text:p>
          </draw:text-box>
        </draw:frame>
        <draw:frame presentation:style-name="pr2" draw:text-style-name="P4" draw:layer="layout" svg:width="25.189cm" svg:height="12.4cm" svg:x="1.124cm" svg:y="2.2cm" presentation:class="subtitle" presentation:user-transformed="true">
          <draw:text-box>
            <text:p text:style-name="P3"><text:span text:style-name="T2">2. Praise the </text:span><text:span text:style-name="T3">LORD, for he is </text:span><text:span text:style-name="T2">good;</text:span></text:p>
            <text:p text:style-name="P3"><text:span text:style-name="T2">sing your </text:span><text:span text:style-name="T3">praise to </text:span><text:span text:style-name="T2">him alone.</text:span></text:p>
            <text:p text:style-name="P3"><text:span text:style-name="T2">He chose </text:span><text:span text:style-name="T3">Jacob for him</text:span><text:span text:style-name="T2">self;</text:span></text:p>
            <text:p text:style-name="P3"><text:span text:style-name="T2">Isra</text:span><text:span text:style-name="T3">el he made his </text:span><text:span text:style-name="T2">own.</text:span></text:p>
            <text:p text:style-name="P3"><text:span text:style-name="T2">Far a</text:span><text:span text:style-name="T3">bove all gods is </text:span><text:span text:style-name="T2">he,</text:span></text:p>
            <text:p text:style-name="P3"><text:span text:style-name="T2">great in </text:span><text:span text:style-name="T3">po</text:span><text:span text:style-name="T2"/><text:span text:style-name="T3">wer</text:span><text:span text:style-name="T2"/><text:span text:style-name="T3"> and </text:span><text:span text:style-name="T2">majesty.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aster1-Office-Theme" presentation:presentation-page-layout-name="AL1T0">
        <office:forms form:automatic-focus="false" form:apply-design-mode="false"/>
        <draw:frame presentation:style-name="pr1" draw:text-style-name="P2" draw:layer="layout" svg:width="16.276cm" svg:height="1.762cm" svg:x="1.144cm" svg:y="0.179cm" presentation:class="title" presentation:user-transformed="true">
          <draw:text-box>
            <text:p text:style-name="P1"><text:span text:style-name="T1">Psalm 135: 1, 2, 5, 6</text:span></text:p>
          </draw:text-box>
        </draw:frame>
        <draw:frame presentation:style-name="pr2" draw:text-style-name="P4" draw:layer="layout" svg:width="25.189cm" svg:height="12.4cm" svg:x="1.124cm" svg:y="2.2cm" presentation:class="subtitle" presentation:user-transformed="true">
          <draw:text-box>
            <text:p text:style-name="P3"><text:span text:style-name="T2">5. Many </text:span><text:span text:style-name="T3">nations he struck</text:span><text:span text:style-name="T2"> down,</text:span></text:p>
            <text:p text:style-name="P3"><text:span text:style-name="T2">kings and </text:span><text:span text:style-name="T3">princes</text:span><text:span text:style-name="T2"> great in might:</text:span></text:p>
            <text:p text:style-name="P3"><text:span text:style-name="T2">Og, the </text:span><text:span text:style-name="T3">king of Bashan</text:span><text:span text:style-name="T2"/><text:span text:style-name="T3">'</text:span><text:span text:style-name="T2"/><text:span text:style-name="T3">s</text:span><text:span text:style-name="T2"> hills,</text:span></text:p>
            <text:p text:style-name="P3"><text:span text:style-name="T2">Sihon </text:span><text:span text:style-name="T3">of the Amo</text:span><text:span text:style-name="T2">rites.</text:span></text:p>
            <text:p text:style-name="P3"><text:span text:style-name="T2">He smote </text:span><text:span text:style-name="T3">Canaan</text:span><text:span text:style-name="T2"/><text:span text:style-name="T3">'</text:span><text:span text:style-name="T2"/><text:span text:style-name="T3">s kingdoms</text:span><text:span text:style-name="T2"> all,</text:span></text:p>
            <text:p text:style-name="P3"><text:span text:style-name="T2">gave their </text:span><text:span text:style-name="T3">land to</text:span><text:span text:style-name="T2"> Israel.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aster1-Office-Theme" presentation:presentation-page-layout-name="AL1T0">
        <office:forms form:automatic-focus="false" form:apply-design-mode="false"/>
        <draw:frame presentation:style-name="pr1" draw:text-style-name="P2" draw:layer="layout" svg:width="16.276cm" svg:height="1.762cm" svg:x="1.144cm" svg:y="0.179cm" presentation:class="title" presentation:user-transformed="true">
          <draw:text-box>
            <text:p text:style-name="P1"><text:span text:style-name="T1">Psalm 135: 1, 2, 5, 6</text:span></text:p>
          </draw:text-box>
        </draw:frame>
        <draw:frame presentation:style-name="pr2" draw:text-style-name="P4" draw:layer="layout" svg:width="25.189cm" svg:height="12.4cm" svg:x="1.124cm" svg:y="2.2cm" presentation:class="subtitle" presentation:user-transformed="true">
          <draw:text-box>
            <text:p text:style-name="P3"><text:span text:style-name="T2">6. Your ex</text:span><text:span text:style-name="T3">alted name, O </text:span><text:span text:style-name="T2">LORD,</text:span></text:p>
            <text:p text:style-name="P3"><text:span text:style-name="T2">will stand </text:span><text:span text:style-name="T3">firm for </text:span><text:span text:style-name="T2">evermore;</text:span></text:p>
            <text:p text:style-name="P3"><text:span text:style-name="T2">your great </text:span><text:span text:style-name="T3">glory and re</text:span><text:span text:style-name="T2">nown</text:span></text:p>
            <text:p text:style-name="P3"><text:span text:style-name="T2">through all </text:span><text:span text:style-name="T3">ages will en</text:span><text:span text:style-name="T2">dure.</text:span></text:p>
            <text:p text:style-name="P3"><text:span text:style-name="T2">For the </text:span><text:span text:style-name="T3">LORD will vindi</text:span><text:span text:style-name="T2">cate</text:span></text:p>
            <text:p text:style-name="P3"><text:span text:style-name="T2">all who </text:span><text:span text:style-name="T3">for his </text:span><text:span text:style-name="T2">mercy wait.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Master1-Office-Theme" presentation:presentation-page-layout-name="AL1T0">
        <office:forms form:automatic-focus="false" form:apply-design-mode="false"/>
        <draw:frame presentation:style-name="pr1" draw:text-style-name="P2" draw:layer="layout" svg:width="16.276cm" svg:height="1.762cm" svg:x="1.144cm" svg:y="0.179cm" presentation:class="title" presentation:user-transformed="true">
          <draw:text-box>
            <text:p text:style-name="P1"><text:span text:style-name="T1">Psalm 110: 1, 2, 3</text:span></text:p>
          </draw:text-box>
        </draw:frame>
        <draw:frame presentation:style-name="pr2" draw:text-style-name="P4" draw:layer="layout" svg:width="25.189cm" svg:height="12.4cm" svg:x="1.124cm" svg:y="2.2cm" presentation:class="subtitle" presentation:user-transformed="true">
          <draw:text-box>
            <text:p text:style-name="P3"><text:span text:style-name="T2">1. The </text:span><text:span text:style-name="T3">L</text:span><text:span text:style-name="T2"/><text:span text:style-name="T3">ORD un</text:span><text:span text:style-name="T2">to my </text:span><text:span text:style-name="T3">Lord these words has</text:span><text:span text:style-name="T2"> spoken:</text:span></text:p>
            <text:p text:style-name="P3"><text:span text:style-name="T2">"Be </text:span><text:span text:style-name="T3">seated </text:span><text:span text:style-name="T2">on the </text:span><text:span text:style-name="T3">throne at my right</text:span><text:span text:style-name="T2"> hand</text:span></text:p>
            <text:p text:style-name="P3"><text:span text:style-name="T2">till </text:span><text:span text:style-name="T3">I the</text:span><text:span text:style-name="T2"> power </text:span><text:span text:style-name="T3">of your foes have</text:span><text:span text:style-name="T2"> bro</text:span><text:span text:style-name="T3">ken,</text:span><text:span text:style-name="T2"/></text:p>
            <text:p text:style-name="P3"><text:span text:style-name="T2"/><text:span text:style-name="T3">and you up</text:span><text:span text:style-name="T2">on their </text:span><text:span text:style-name="T3">necks</text:span><text:span text:style-name="T2"> </text:span><text:span text:style-name="T3">your</text:span><text:span text:style-name="T2"> foot shall plant." </text:span></text:p>
            <text:p text:style-name="P3"><text:span text:style-name="T2"/></text:p>
            <text:p text:style-name="P3"><text:span text:style-name="T2">2. To </text:span><text:span text:style-name="T3">you the </text:span><text:span text:style-name="T2">LORD will </text:span><text:span text:style-name="T3">send forth out of </text:span><text:span text:style-name="T2">Zion</text:span></text:p>
            <text:p text:style-name="P3"><text:span text:style-name="T2"> the </text:span><text:span text:style-name="T3">sceptre </text:span><text:span text:style-name="T2">of au</text:span><text:span text:style-name="T3">thority and </text:span><text:span text:style-name="T2">might.</text:span></text:p>
            <text:p text:style-name="P3"><text:span text:style-name="T2">A</text:span><text:span text:style-name="T3">midst your </text:span><text:span text:style-name="T2">ene</text:span><text:span text:style-name="T3">mies show your do</text:span><text:span text:style-name="T2">min</text:span><text:span text:style-name="T3">ion</text:span><text:span text:style-name="T2"/></text:p>
            <text:p text:style-name="P3"><text:span text:style-name="T2"/><text:span text:style-name="T3"> </text:span><text:span text:style-name="T2"/><text:span text:style-name="T3">and rule them </text:span><text:span text:style-name="T2">by your </text:span><text:span text:style-name="T3">own God</text:span><text:span text:style-name="T2">-given right.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Master1-Office-Theme" presentation:presentation-page-layout-name="AL1T0">
        <office:forms form:automatic-focus="false" form:apply-design-mode="false"/>
        <draw:frame presentation:style-name="pr1" draw:text-style-name="P2" draw:layer="layout" svg:width="16.276cm" svg:height="1.762cm" svg:x="1.144cm" svg:y="0.179cm" presentation:class="title" presentation:user-transformed="true">
          <draw:text-box>
            <text:p text:style-name="P1"><text:span text:style-name="T1">Psalm 110: 1, 2, 3</text:span></text:p>
          </draw:text-box>
        </draw:frame>
        <draw:frame presentation:style-name="pr2" draw:text-style-name="P4" draw:layer="layout" svg:width="25.189cm" svg:height="12.4cm" svg:x="1.124cm" svg:y="2.2cm" presentation:class="subtitle" presentation:user-transformed="true">
          <draw:text-box>
            <text:p text:style-name="P3"><text:span text:style-name="T2">3. Your </text:span><text:span text:style-name="T3">people </text:span><text:span text:style-name="T2">will be </text:span><text:span text:style-name="T3">wholly glad and </text:span><text:span text:style-name="T2">willing</text:span></text:p>
            <text:p text:style-name="P3"><text:span text:style-name="T2"> when </text:span><text:span text:style-name="T3">you to </text:span><text:span text:style-name="T2">your great </text:span><text:span text:style-name="T3">battle summon </text:span><text:span text:style-name="T2">them.</text:span></text:p>
            <text:p text:style-name="P3"><text:span text:style-name="T2">Your </text:span><text:span text:style-name="T3">youth will </text:span><text:span text:style-name="T2">come, as </text:span><text:span text:style-name="T3">dew when day is </text:span><text:span text:style-name="T2">dawn</text:span><text:span text:style-name="T3">ing</text:span><text:span text:style-name="T2">;</text:span></text:p>
            <text:p text:style-name="P3"><text:span text:style-name="T2"/><text:span text:style-name="T3">arrayed in </text:span><text:span text:style-name="T2">holi</text:span><text:span text:style-name="T3">ness are </text:span><text:span text:style-name="T2">your young men.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Master1-Office-Theme" presentation:presentation-page-layout-name="AL1T0">
        <office:forms form:automatic-focus="false" form:apply-design-mode="false"/>
        <draw:frame presentation:style-name="pr1" draw:text-style-name="P2" draw:layer="layout" svg:width="16.276cm" svg:height="1.762cm" svg:x="1.144cm" svg:y="0.179cm" presentation:class="title" presentation:user-transformed="true">
          <draw:text-box>
            <text:p text:style-name="P1"><text:span text:style-name="T1">Psalm 110: 5, 6</text:span></text:p>
          </draw:text-box>
        </draw:frame>
        <draw:frame presentation:style-name="pr2" draw:text-style-name="P4" draw:layer="layout" svg:width="25.189cm" svg:height="12.4cm" svg:x="1.124cm" svg:y="2.2cm" presentation:class="subtitle" presentation:user-transformed="true">
          <draw:text-box>
            <text:p text:style-name="P3"><text:span text:style-name="T2">5. The </text:span><text:span text:style-name="T3">LORD is </text:span><text:span text:style-name="T2">at your </text:span><text:span text:style-name="T3">right hand; he will </text:span><text:span text:style-name="T2">scatter</text:span></text:p>
            <text:p text:style-name="P3"><text:span text:style-name="T2"> kings </text:span><text:span text:style-name="T3">who op</text:span><text:span text:style-name="T2">pose him </text:span><text:span text:style-name="T3">on his day of </text:span><text:span text:style-name="T2">wrath;</text:span></text:p>
            <text:p text:style-name="P3"><text:span text:style-name="T2">all </text:span><text:span text:style-name="T3">nations </text:span><text:span text:style-name="T2">he as </text:span><text:span text:style-name="T3">judge will slay and </text:span><text:span text:style-name="T2">shat</text:span><text:span text:style-name="T3">ter</text:span><text:span text:style-name="T2">,</text:span></text:p>
            <text:p text:style-name="P3"><text:span text:style-name="T2"/><text:span text:style-name="T3">and he will </text:span><text:span text:style-name="T2">crush who</text:span><text:span text:style-name="T3">ever </text:span><text:span text:style-name="T2">blocks his path. </text:span></text:p>
            <text:p text:style-name="P3"><text:span text:style-name="T2"/></text:p>
            <text:p text:style-name="P3"><text:span text:style-name="T2">6. From </text:span><text:span text:style-name="T3">wayside </text:span><text:span text:style-name="T2">brooks he'll </text:span><text:span text:style-name="T3">drink refreshing </text:span><text:span text:style-name="T2">water;</text:span></text:p>
            <text:p text:style-name="P3"><text:span text:style-name="T2">in </text:span><text:span text:style-name="T3">his cam</text:span><text:span text:style-name="T2">paign he </text:span><text:span text:style-name="T3">will not fail or </text:span><text:span text:style-name="T2">fall.</text:span></text:p>
            <text:p text:style-name="P3"><text:span text:style-name="T2">His </text:span><text:span text:style-name="T3">ene</text:span><text:span text:style-name="T2">mies will </text:span><text:span text:style-name="T3">never make him </text:span><text:span text:style-name="T2">fal</text:span><text:span text:style-name="T3">ter</text:span><text:span text:style-name="T2">;</text:span></text:p>
            <text:p text:style-name="P3"><text:span text:style-name="T2"/><text:span text:style-name="T3">he will lift </text:span><text:span text:style-name="T2">up his </text:span><text:span text:style-name="T3">head and </text:span><text:span text:style-name="T2">rule them all.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Master1-Office-Theme" presentation:presentation-page-layout-name="AL1T0">
        <office:forms form:automatic-focus="false" form:apply-design-mode="false"/>
        <draw:frame presentation:style-name="pr1" draw:text-style-name="P2" draw:layer="layout" svg:width="16.276cm" svg:height="1.762cm" svg:x="1.144cm" svg:y="0.179cm" presentation:class="title" presentation:user-transformed="true">
          <draw:text-box>
            <text:p text:style-name="P1"><text:span text:style-name="T1">Hymn 1: The Apostles' Creed</text:span></text:p>
          </draw:text-box>
        </draw:frame>
        <draw:frame presentation:style-name="pr2" draw:text-style-name="P4" draw:layer="layout" svg:width="25.189cm" svg:height="12.4cm" svg:x="1.124cm" svg:y="2.2cm" presentation:class="subtitle" presentation:user-transformed="true">
          <draw:text-box>
            <text:p text:style-name="P3"><text:span text:style-name="T2">1. I believe in God the Father almighty,</text:span></text:p>
            <text:p text:style-name="P3"><text:span text:style-name="T2">Maker of heaven and earth.</text:span></text:p>
            <text:p text:style-name="P3"><text:span text:style-name="T2">And in Jesus Christ, his only begotten Son, our Lord;</text:span></text:p>
            <text:p text:style-name="P3"><text:span text:style-name="T2">who was conceived by the Holy Spirit,</text:span></text:p>
            <text:p text:style-name="P3"><text:span text:style-name="T2">born of the virgin Mary;</text:span></text:p>
            <text:p text:style-name="P3"><text:span text:style-name="T2">suffered under Pontius Pilate;</text:span></text:p>
            <text:p text:style-name="P3"><text:span text:style-name="T2">was crucified, dead, and buried;</text:span></text:p>
            <text:p text:style-name="P3"><text:span text:style-name="T2">he descended into hell;</text:span></text:p>
            <text:p text:style-name="P3"><text:span text:style-name="T2">the third day he rose again from the dead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Master1-Office-Theme" presentation:presentation-page-layout-name="AL1T0">
        <office:forms form:automatic-focus="false" form:apply-design-mode="false"/>
        <draw:frame presentation:style-name="pr1" draw:text-style-name="P2" draw:layer="layout" svg:width="16.276cm" svg:height="1.762cm" svg:x="1.144cm" svg:y="0.179cm" presentation:class="title" presentation:user-transformed="true">
          <draw:text-box>
            <text:p text:style-name="P1"><text:span text:style-name="T1">Hymn 1: The Apostles' Creed</text:span></text:p>
          </draw:text-box>
        </draw:frame>
        <draw:frame presentation:style-name="pr2" draw:text-style-name="P4" draw:layer="layout" svg:width="25.189cm" svg:height="12.4cm" svg:x="1.124cm" svg:y="2.2cm" presentation:class="subtitle" presentation:user-transformed="true">
          <draw:text-box>
            <text:p text:style-name="P3"><text:span text:style-name="T2">he ascended into heaven</text:span></text:p>
            <text:p text:style-name="P3"><text:span text:style-name="T2">and sitteth at the right hand of God the Father almighty;</text:span></text:p>
            <text:p text:style-name="P3"><text:span text:style-name="T2">from there he shall come to judge the living and the dead.</text:span></text:p>
            <text:p text:style-name="P3"><text:span text:style-name="T2">I believe in the Holy Spirit;</text:span></text:p>
            <text:p text:style-name="P3"><text:span text:style-name="T2">I believe a holy catholic church,</text:span></text:p>
            <text:p text:style-name="P3"><text:span text:style-name="T2">the communion of saints;</text:span></text:p>
            <text:p text:style-name="P3"><text:span text:style-name="T2">the forgiveness of sins;</text:span></text:p>
            <text:p text:style-name="P3"><text:span text:style-name="T2">the resurrection of the body;</text:span></text:p>
            <text:p text:style-name="P3"><text:span text:style-name="T2">and the life everlasting. Amen.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Master1-Office-Theme" presentation:presentation-page-layout-name="AL1T0">
        <office:forms form:automatic-focus="false" form:apply-design-mode="false"/>
        <draw:frame presentation:style-name="pr1" draw:text-style-name="P2" draw:layer="layout" svg:width="16.276cm" svg:height="1.762cm" svg:x="1.144cm" svg:y="0.179cm" presentation:class="title" presentation:user-transformed="true">
          <draw:text-box>
            <text:p text:style-name="P1"><text:span text:style-name="T1">Hymn 45: 1, 2, 3</text:span></text:p>
          </draw:text-box>
        </draw:frame>
        <draw:frame presentation:style-name="pr2" draw:text-style-name="P4" draw:layer="layout" svg:width="25.189cm" svg:height="12.4cm" svg:x="1.124cm" svg:y="2.2cm" presentation:class="subtitle" presentation:user-transformed="true">
          <draw:text-box>
            <text:p text:style-name="P3"><text:span text:style-name="T2">1. Jesus shall reign where'er the sun</text:span></text:p>
            <text:p text:style-name="P3"><text:span text:style-name="T2">does its successive journeys run,</text:span></text:p>
            <text:p text:style-name="P3"><text:span text:style-name="T2">his kingdom stretch from shore to shore,</text:span></text:p>
            <text:p text:style-name="P3"><text:span text:style-name="T2">till moons shall wax and wane no more. </text:span></text:p>
            <text:p text:style-name="P3"><text:span text:style-name="T2"/></text:p>
            <text:p text:style-name="P3"><text:span text:style-name="T2">2. Blessings abound where'er he reigns:</text:span></text:p>
            <text:p text:style-name="P3"><text:span text:style-name="T2">the prisoners leap to lose their chains,</text:span></text:p>
            <text:p text:style-name="P3"><text:span text:style-name="T2">the weary find eternal rest,</text:span></text:p>
            <text:p text:style-name="P3"><text:span text:style-name="T2">and all who suffer want are blest.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Master1-Office-Theme" presentation:presentation-page-layout-name="AL1T0">
        <office:forms form:automatic-focus="false" form:apply-design-mode="false"/>
        <draw:frame presentation:style-name="pr1" draw:text-style-name="P2" draw:layer="layout" svg:width="16.276cm" svg:height="1.762cm" svg:x="1.144cm" svg:y="0.179cm" presentation:class="title" presentation:user-transformed="true">
          <draw:text-box>
            <text:p text:style-name="P1"><text:span text:style-name="T1">Hymn 45: 1, 2, 3</text:span></text:p>
          </draw:text-box>
        </draw:frame>
        <draw:frame presentation:style-name="pr2" draw:text-style-name="P4" draw:layer="layout" svg:width="25.189cm" svg:height="12.4cm" svg:x="1.124cm" svg:y="2.2cm" presentation:class="subtitle" presentation:user-transformed="true">
          <draw:text-box>
            <text:p text:style-name="P3"><text:span text:style-name="T2">3. Let every creature rise and bring</text:span></text:p>
            <text:p text:style-name="P3"><text:span text:style-name="T2">the highest honours to our King,</text:span></text:p>
            <text:p text:style-name="P3"><text:span text:style-name="T2">angels descend with songs again,</text:span></text:p>
            <text:p text:style-name="P3"><text:span text:style-name="T2">and earth repeat the loud amen.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/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Paragraph_20_Font" style:display-name="Default Paragraph Font" style:family="graphic">
      <style:paragraph-properties fo:margin-left="0cm" fo:margin-right="0cm" fo:text-align="start" fo:text-indent="0cm" style:text-autospace="ideograph-alpha"/>
      <style:text-properties style:font-name="Times New Roman" fo:font-family="'Times New Roman'" style:font-family-generic="roman" style:font-pitch="variable" fo:font-size="12pt" fo:language="en" fo:country="US" style:font-name-asian="Arial Unicode MS" style:font-family-asian="'Arial Unicode MS'" style:font-family-generic-asian="swiss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Body_20_A" style:display-name="Body A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fo:color="#000000" loext:opacity="100%" style:font-name="Arial1" fo:font-family="Arial" style:font-family-generic="swiss" style:font-pitch="variable" fo:font-size="11pt" fo:language="en" fo:country="US" style:text-underline-style="solid" style:text-underline-width="auto" style:text-underline-color="#000000" style:font-name-asian="Arial Unicode MS" style:font-family-asian="'Arial Unicode MS'" style:font-family-generic-asian="swiss" style:font-pitch-asian="variable" style:font-size-asian="11pt" style:language-asian="en" style:country-asian="US" style:font-name-complex="Arial Unicode MS" style:font-family-complex="'Arial Unicode MS'" style:font-family-generic-complex="swiss" style:font-pitch-complex="variable" style:font-size-complex="11pt" style:language-complex="ar" style:country-complex="SA"/>
    </style:style>
    <style:style style:name="Plain_20_Text" style:display-name="Plain Text" style:family="graphic">
      <style:paragraph-properties fo:margin-left="0cm" fo:margin-right="0cm" fo:text-align="start" fo:text-indent="0cm" style:text-autospace="ideograph-alpha"/>
      <style:text-properties fo:color="#000000" loext:opacity="100%" style:font-name="Courier" fo:font-family="Courier" style:font-family-generic="modern" style:font-pitch="fixed" fo:font-size="10.5pt" fo:language="en" fo:country="US" style:text-underline-style="solid" style:text-underline-width="auto" style:text-underline-color="#000000" style:font-name-asian="Courier" style:font-family-asian="Courier" style:font-family-generic-asian="modern" style:font-pitch-asian="fixed" style:font-size-asian="10.5pt" style:language-asian="en" style:country-asian="US" style:font-name-complex="Courier" style:font-family-complex="Courier" style:font-family-generic-complex="modern" style:font-pitch-complex="fixed" style:font-size-complex="10.5pt" style:language-complex="ar" style:country-complex="SA"/>
    </style:style>
    <style:style style:name="Plain_20_Text_20_Char" style:display-name="Plain Text Char" style:family="graphic">
      <style:paragraph-properties style:text-autospace="none"/>
      <style:text-properties fo:color="#000000" loext:opacity="100%" style:font-name="Courier" fo:font-family="Courier" style:font-family-generic="modern" style:font-pitch="fixed" fo:font-size="10.5pt" fo:language="en" fo:country="US" style:text-underline-style="solid" style:text-underline-width="auto" style:text-underline-color="#000000" style:font-name-asian="Courier" style:font-family-asian="Courier" style:font-family-generic-asian="modern" style:font-pitch-asian="fixed" style:font-size-asian="10.5pt" style:language-asian="en" style:country-asian="US" style:font-name-complex="Courier" style:font-family-complex="Courier" style:font-family-generic-complex="modern" style:font-pitch-complex="fixed" style:font-size-complex="10.5pt"/>
    </style:styl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blank-1_5f_5f_5f_Blank-background" style:display-name="Master1-Layout12-blank-1_5f_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2-blank-1_5f_5f_5f_Blank-backgroundobjects" style:display-name="Master1-Layout12-blank-1_5f_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blank-1_5f_5f_5f_Blank-notes" style:display-name="Master1-Layout12-blank-1_5f_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blank-1_5f_5f_5f_Blank-outline1" style:display-name="Master1-Layout12-blank-1_5f_Blank-outline1" style:family="presentation">
      <style:graphic-properties draw:stroke="none" draw:fill="none" draw:auto-grow-height="false" draw:fit-to-size="false" style:shrink-to-fit="true">
        <text:list-style style:name="Master1-Layout12-blank-1_5f_5f_5f_Blank-outline1" style:display-name="Master1-Layout12-blank-1_5f_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blank-1_5f_5f_5f_Blank-outline2" style:display-name="Master1-Layout12-blank-1_5f_Blank-outline2" style:family="presentation" style:parent-style-name="Master1-Layout12-blank-1_5f_5f_5f_Blank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Master1-Layout12-blank-1_5f_5f_5f_Blank-outline3" style:display-name="Master1-Layout12-blank-1_5f_Blank-outline3" style:family="presentation" style:parent-style-name="Master1-Layout12-blank-1_5f_5f_5f_Blank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Master1-Layout12-blank-1_5f_5f_5f_Blank-outline4" style:display-name="Master1-Layout12-blank-1_5f_Blank-outline4" style:family="presentation" style:parent-style-name="Master1-Layout12-blank-1_5f_5f_5f_Blank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Master1-Layout12-blank-1_5f_5f_5f_Blank-outline5" style:display-name="Master1-Layout12-blank-1_5f_Blank-outline5" style:family="presentation" style:parent-style-name="Master1-Layout12-blank-1_5f_5f_5f_Blank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12-blank-1_5f_5f_5f_Blank-outline6" style:display-name="Master1-Layout12-blank-1_5f_Blank-outline6" style:family="presentation" style:parent-style-name="Master1-Layout12-blank-1_5f_5f_5f_Blank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12-blank-1_5f_5f_5f_Blank-outline7" style:display-name="Master1-Layout12-blank-1_5f_Blank-outline7" style:family="presentation" style:parent-style-name="Master1-Layout12-blank-1_5f_5f_5f_Blank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12-blank-1_5f_5f_5f_Blank-outline8" style:display-name="Master1-Layout12-blank-1_5f_Blank-outline8" style:family="presentation" style:parent-style-name="Master1-Layout12-blank-1_5f_5f_5f_Blank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12-blank-1_5f_5f_5f_Blank-outline9" style:display-name="Master1-Layout12-blank-1_5f_Blank-outline9" style:family="presentation" style:parent-style-name="Master1-Layout12-blank-1_5f_5f_5f_Blank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12-blank-1_5f_5f_5f_Blank-subtitle" style:display-name="Master1-Layout12-blank-1_5f_Blank-subtitle" style:family="presentation">
      <style:graphic-properties draw:stroke="none" draw:fill="none" draw:textarea-vertical-align="middle">
        <text:list-style style:name="Master1-Layout12-blank-1_5f_5f_5f_Blank-subtitle" style:display-name="Master1-Layout12-blank-1_5f_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blank-1_5f_5f_5f_Blank-title" style:display-name="Master1-Layout12-blank-1_5f_Blank-title" style:family="presentation">
      <style:graphic-properties draw:stroke="none" draw:fill="none" draw:textarea-vertical-align="middle">
        <text:list-style style:name="Master1-Layout12-blank-1_5f_5f_5f_Blank-title" style:display-name="Master1-Layout12-blank-1_5f_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 loext:decorative="false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 loext:decorative="false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3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9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0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7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4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2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7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8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0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1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8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9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6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false" style:shrink-to-fit="true" fo:min-width="25.201cm" fo:padding-top="0.127cm" fo:padding-bottom="0.127cm" fo:padding-left="0.254cm" fo:padding-right="0.254cm" fo:wrap-option="wrap" loext:decorative="false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2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83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85" style:family="presentation" style:parent-style-name="Master1-Layout12-blank-1_5f_5f_5f_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6" style:family="presentation" style:parent-style-name="Master1-Layout12-blank-1_5f_5f_5f_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7" style:family="presentation" style:parent-style-name="Master1-Layout12-blank-1_5f_5f_5f_Blank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88" style:family="presentation" style:parent-style-name="Master1-Layout12-blank-1_5f_5f_5f_Blank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89" style:family="presentation" style:parent-style-name="Master1-Layout12-blank-1_5f_5f_5f_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90" style:family="presentation" style:parent-style-name="Master1-Layout12-blank-1_5f_5f_5f_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91" style:family="presentation" style:parent-style-name="Master1-Layout12-blank-1_5f_5f_5f_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1" style:family="paragraph">
      <loext:graphic-properties draw:fill="none"/>
      <style:paragraph-properties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loext:tab-stop-distance="0cm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P4" style:family="paragraph">
      <loext:graphic-properties draw:fill="none"/>
      <style:paragraph-properties style:font-independent-line-spacing="true"/>
    </style:style>
    <style:style style:name="MP5" style:family="paragraph">
      <style:paragraph-properties fo:margin-left="0.525cm" fo:margin-right="0cm" fo:margin-top="0.291cm" fo:margin-bottom="0cm" fo:line-height="90%" fo:text-align="start" fo:text-indent="-0.525cm" style:punctuation-wrap="hanging" loext:tab-stop-distance="0cm" style:writing-mode="lr-tb">
        <style:tab-stops/>
      </style:paragraph-properties>
    </style:style>
    <style:style style:name="MP6" style:family="paragraph">
      <style:paragraph-properties fo:margin-left="1.575cm" fo:margin-right="0cm" fo:margin-top="0.146cm" fo:margin-bottom="0cm" fo:line-height="90%" fo:text-align="start" fo:text-indent="-0.525cm" style:punctuation-wrap="hanging" loext:tab-stop-distance="0cm" style:writing-mode="lr-tb">
        <style:tab-stops/>
      </style:paragraph-properties>
    </style:style>
    <style:style style:name="MP7" style:family="paragraph">
      <style:paragraph-properties fo:margin-left="2.625cm" fo:margin-right="0cm" fo:margin-top="0.146cm" fo:margin-bottom="0cm" fo:line-height="90%" fo:text-align="start" fo:text-indent="-0.525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3.675cm" fo:margin-right="0cm" fo:margin-top="0.146cm" fo:margin-bottom="0cm" fo:line-height="90%" fo:text-align="start" fo:text-indent="-0.525cm" style:punctuation-wrap="hanging" loext:tab-stop-distance="0cm" style:writing-mode="lr-tb">
        <style:tab-stops/>
      </style:paragraph-properties>
    </style:style>
    <style:style style:name="MP9" style:family="paragraph">
      <style:paragraph-properties fo:margin-left="4.725cm" fo:margin-right="0cm" fo:margin-top="0.146cm" fo:margin-bottom="0cm" fo:line-height="90%" fo:text-align="start" fo:text-indent="-0.525cm" style:punctuation-wrap="hanging" loext:tab-stop-distance="0cm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2" style:family="paragraph">
      <style:paragraph-properties fo:margin-left="0cm" fo:margin-right="0cm" fo:margin-top="0.291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3" style:family="paragraph">
      <style:paragraph-properties fo:margin-left="0cm" fo:margin-right="0cm" fo:margin-top="0.291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4pt" style:font-style-asian="normal" style:font-weight-asian="normal" style:font-name-complex="Lucida Sans" style:font-size-complex="14pt" style:font-style-complex="normal" style:font-weight-complex="normal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Calibri Light" fo:font-size="36.400001525878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36.4000015258789pt" style:font-style-asian="normal" style:font-weight-asian="normal" style:font-name-complex="Lucida Sans" style:font-size-complex="36.4000015258789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23.200000762939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3.2000007629395pt" style:font-style-asian="normal" style:font-weight-asian="normal" style:font-name-complex="Lucida Sans" style:font-size-complex="23.2000007629395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9.899999618530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19.8999996185303pt" style:font-style-asian="normal" style:font-weight-asian="normal" style:font-name-complex="Lucida Sans" style:font-size-complex="19.8999996185303pt" style:font-style-complex="normal" style:font-weight-complex="normal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6.6000003814697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16.6000003814697pt" style:font-style-asian="normal" style:font-weight-asian="normal" style:font-name-complex="Lucida Sans" style:font-size-complex="16.6000003814697pt" style:font-style-complex="normal" style:font-weight-complex="normal"/>
    </style:style>
    <style:style style:name="MT6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4.899999618530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14.8999996185303pt" style:font-style-asian="normal" style:font-weight-asian="normal" style:font-name-complex="Lucida Sans" style:font-size-complex="14.8999996185303pt" style:font-style-complex="normal" style:font-weight-complex="normal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9.89999961853027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9.89999961853027pt" style:font-style-asian="normal" style:font-weight-asian="normal" style:font-name-complex="Tahoma" style:font-size-complex="9.89999961853027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Calibri Light" fo:font-size="49.59999847412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49.5999984741211pt" style:font-style-asian="normal" style:font-weight-asian="normal" style:font-name-complex="Lucida Sans" style:font-size-complex="49.5999984741211pt" style:font-style-complex="normal" style:font-weight-complex="normal"/>
    </style:style>
    <style:style style:name="MT10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9.8999996185303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19.8999996185303pt" style:font-style-asian="normal" style:font-weight-asian="bold" style:font-name-complex="Lucida Sans" style:font-size-complex="19.8999996185303pt" style:font-style-complex="normal" style:font-weight-complex="bold"/>
    </style:style>
    <style:style style:name="MT11" style:family="text">
      <style:text-properties fo:font-variant="normal" fo:text-transform="none" fo:color="#ffffff" loext:opacity="100%" style:text-line-through-style="none" style:text-line-through-type="none" style:text-position="0% 100%" style:font-name="Calibri Light" fo:font-size="26.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6.5pt" style:font-style-asian="normal" style:font-weight-asian="normal" style:font-name-complex="Lucida Sans" style:font-size-complex="26.5pt" style:font-style-complex="normal" style:font-weight-complex="normal"/>
    </style:style>
    <style:style style:name="MT12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26.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6.5pt" style:font-style-asian="normal" style:font-weight-asian="normal" style:font-name-complex="Lucida Sans" style:font-size-complex="26.5pt" style:font-style-complex="normal" style:font-weight-complex="normal"/>
    </style:style>
    <style:style style:name="MT13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3.300000190734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13.3000001907349pt" style:font-style-asian="normal" style:font-weight-asian="normal" style:font-name-complex="Lucida Sans" style:font-size-complex="13.300000190734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525cm"/>
        <style:text-properties style:font-name="Arial1" style:use-window-font-color="true" fo:font-size="100%"/>
      </text:list-level-style-bullet>
      <text:list-level-style-bullet text:level="2" text:bullet-char="•">
        <style:list-level-properties text:space-before="1.05cm" text:min-label-width="0.525cm"/>
        <style:text-properties style:font-name="Arial1" style:use-window-font-color="true" fo:font-size="100%"/>
      </text:list-level-style-bullet>
      <text:list-level-style-bullet text:level="3" text:bullet-char="•">
        <style:list-level-properties text:space-before="2.1cm" text:min-label-width="0.525cm"/>
        <style:text-properties style:font-name="Arial1" style:use-window-font-color="true" fo:font-size="100%"/>
      </text:list-level-style-bullet>
      <text:list-level-style-bullet text:level="4" text:bullet-char="•">
        <style:list-level-properties text:space-before="3.15cm" text:min-label-width="0.525cm"/>
        <style:text-properties style:font-name="Arial1" style:use-window-font-color="true" fo:font-size="100%"/>
      </text:list-level-style-bullet>
      <text:list-level-style-bullet text:level="5" text:bullet-char="•">
        <style:list-level-properties text:space-before="4.2cm" text:min-label-width="0.525cm"/>
        <style:text-properties style:font-name="Arial1" style:use-window-font-color="true" fo:font-size="100%"/>
      </text:list-level-style-bullet>
      <text:list-level-style-bullet text:level="6" text:bullet-char="•">
        <style:list-level-properties text:space-before="5.825cm" text:min-label-width="0.525cm"/>
        <style:text-properties style:font-name="Arial1" style:use-window-font-color="true" fo:font-size="100%"/>
      </text:list-level-style-bullet>
      <text:list-level-style-bullet text:level="7" text:bullet-char="•">
        <style:list-level-properties text:space-before="7.095cm" text:min-label-width="0.525cm"/>
        <style:text-properties style:font-name="Arial1" style:use-window-font-color="true" fo:font-size="100%"/>
      </text:list-level-style-bullet>
      <text:list-level-style-bullet text:level="8" text:bullet-char="•">
        <style:list-level-properties text:space-before="8.365cm" text:min-label-width="0.525cm"/>
        <style:text-properties style:font-name="Arial1" style:use-window-font-color="true" fo:font-size="100%"/>
      </text:list-level-style-bullet>
      <text:list-level-style-bullet text:level="9" text:bullet-char="•">
        <style:list-level-properties text:space-before="9.635cm" text:min-label-width="0.525cm"/>
        <style:text-properties style:font-name="Arial1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575cm"/>
        <style:text-properties style:use-window-font-color="true" fo:font-size="45%"/>
      </text:list-level-style-number>
      <text:list-level-style-number text:level="3" style:num-format="">
        <style:list-level-properties text:space-before="2.625cm"/>
        <style:text-properties style:use-window-font-color="true" fo:font-size="45%"/>
      </text:list-level-style-number>
      <text:list-level-style-number text:level="4" style:num-format="">
        <style:list-level-properties text:space-before="3.675cm"/>
        <style:text-properties style:use-window-font-color="true" fo:font-size="45%"/>
      </text:list-level-style-number>
      <text:list-level-style-number text:level="5" style:num-format="">
        <style:list-level-properties text:space-before="4.72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Slide Number Placeholder 4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Placeholder 1" presentation:style-name="Mpr1" draw:text-style-name="MP4" draw:layer="backgroundobjects" svg:width="24.142cm" svg:height="3.044cm" svg:x="1.924cm" svg:y="0.838cm" presentation:class="title">
        <draw:text-box>
          <text:p text:style-name="MP3"><text:span text:style-name="MT2">Click to edit Master title style</text:span></text:p>
        </draw:text-box>
      </draw:frame>
      <draw:frame draw:name="Text Placeholder 2" presentation:style-name="Mpr2" draw:text-style-name="MP4" draw:layer="backgroundobjects" svg:width="24.142cm" svg:height="9.991cm" svg:x="1.924cm" svg:y="4.191cm" presentation:class="outline">
        <draw:text-box>
          <text:list text:style-name="ML2">
            <text:list-item>
              <text:p text:style-name="MP5"><text:span text:style-name="MT3">Click to edit Master text styles</text:span></text:p>
              <text:list>
                <text:list-item>
                  <text:p text:style-name="MP6"><text:span text:style-name="MT4">Second level</text:span></text:p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4" draw:layer="backgroundobjects" svg:width="6.298cm" svg:height="0.839cm" svg:x="1.924cm" svg:y="14.595cm" presentation:class="date-time">
        <draw:text-box>
          <text:p/>
        </draw:text-box>
      </draw:frame>
      <draw:frame draw:name="Footer Placeholder 4" presentation:style-name="Mpr4" draw:text-style-name="MP4" draw:layer="backgroundobjects" svg:width="9.447cm" svg:height="0.839cm" svg:x="9.272cm" svg:y="14.595cm" presentation:class="footer">
        <draw:text-box>
          <text:p/>
        </draw:text-box>
      </draw:frame>
      <draw:frame draw:name="Slide Number Placeholder 5" presentation:style-name="Mpr3" draw:text-style-name="MP4" draw:layer="backgroundobjects" svg:width="6.298cm" svg:height="0.839cm" svg:x="19.768cm" svg:y="14.595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draw:name="Slide Image Placeholder 1" presentation:style-name="Master1-Office-Theme-title" draw:layer="backgroundobjects" svg:width="18.624cm" svg:height="10.476cm" svg:x="1.482cm" svg:y="2.123cm" presentation:class="page"/>
        <draw:frame draw:name="Notes Placeholder 2" presentation:style-name="Mpr5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6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6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7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7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8" draw:text-style-name="MP4" draw:layer="backgroundobjects" svg:width="20.993cm" svg:height="5.483cm" svg:x="3.498cm" svg:y="2.577cm" presentation:class="title">
        <draw:text-box>
          <text:p text:style-name="MP11"><text:span text:style-name="MT9">Click to edit Master title style</text:span></text:p>
        </draw:text-box>
      </draw:frame>
      <draw:frame draw:name="Subtitle 2" presentation:style-name="Mpr9" draw:text-style-name="MP4" draw:layer="backgroundobjects" svg:width="20.993cm" svg:height="3.802cm" svg:x="3.498cm" svg:y="8.27cm" presentation:class="subtitle">
        <draw:text-box>
          <text:p text:style-name="MP12"><text:span text:style-name="MT4">Click to edit Master subtitle style</text:span></text:p>
        </draw:text-box>
      </draw:frame>
      <draw:frame draw:name="Date Placeholder 3" presentation:style-name="Mpr10" draw:text-style-name="MP4" draw:layer="backgroundobjects" svg:width="6.298cm" svg:height="0.839cm" svg:x="1.924cm" svg:y="14.595cm" presentation:class="date-time">
        <draw:text-box>
          <text:p/>
        </draw:text-box>
      </draw:frame>
      <draw:frame draw:name="Footer Placeholder 4" presentation:style-name="Mpr11" draw:text-style-name="MP4" draw:layer="backgroundobjects" svg:width="9.447cm" svg:height="0.839cm" svg:x="9.272cm" svg:y="14.595cm" presentation:class="footer">
        <draw:text-box>
          <text:p/>
        </draw:text-box>
      </draw:frame>
      <draw:frame draw:name="Slide Number Placeholder 5" presentation:style-name="Mpr10" draw:text-style-name="MP4" draw:layer="backgroundobjects" svg:width="6.298cm" svg:height="0.839cm" svg:x="19.768cm" svg:y="14.595cm" presentation:class="page-number">
        <draw:text-box>
          <text:p text:style-name="MP10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25.19cm" svg:height="9.132cm" svg:x="1.399cm" svg:y="3.685cm" presentation:class="outline" presentation:placeholder="true">
        <draw:text-box/>
      </draw:frame>
      <presentation:notes style:page-layout-name="PM0">
        <draw:page-thumbnail draw:name="Slide Image Placeholder 1" presentation:style-name="Master1-Layout1-title-Title-Slide-title" draw:layer="backgroundobjects" svg:width="18.624cm" svg:height="10.476cm" svg:x="1.482cm" svg:y="2.123cm" presentation:class="page"/>
        <draw:frame draw:name="Notes Placeholder 2" presentation:style-name="Mpr12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3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3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4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4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5" draw:text-style-name="MP4" draw:layer="backgroundobjects" svg:width="24.142cm" svg:height="3.044cm" svg:x="1.924cm" svg:y="0.838cm" presentation:class="title">
        <draw:text-box>
          <text:p text:style-name="MP3"><text:span text:style-name="MT2">Click to edit Master title style</text:span></text:p>
        </draw:text-box>
      </draw:frame>
      <draw:frame draw:name="Content Placeholder 2" presentation:style-name="Mpr16" draw:text-style-name="MP4" draw:layer="backgroundobjects" svg:width="24.142cm" svg:height="9.991cm" svg:x="1.924cm" svg:y="4.191cm" presentation:class="title">
        <draw:text-box>
          <text:list text:style-name="ML4">
            <text:list-item>
              <text:p text:style-name="MP5"><text:span text:style-name="MT3">Click to edit Master text styles</text:span></text:p>
              <text:list>
                <text:list-item>
                  <text:p text:style-name="MP6"><text:span text:style-name="MT4">Second level</text:span></text:p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4" draw:layer="backgroundobjects" svg:width="6.298cm" svg:height="0.839cm" svg:x="1.924cm" svg:y="14.595cm" presentation:class="date-time">
        <draw:text-box>
          <text:p/>
        </draw:text-box>
      </draw:frame>
      <draw:frame draw:name="Footer Placeholder 4" presentation:style-name="Mpr18" draw:text-style-name="MP4" draw:layer="backgroundobjects" svg:width="9.447cm" svg:height="0.839cm" svg:x="9.272cm" svg:y="14.595cm" presentation:class="footer">
        <draw:text-box>
          <text:p/>
        </draw:text-box>
      </draw:frame>
      <draw:frame draw:name="Slide Number Placeholder 5" presentation:style-name="Mpr17" draw:text-style-name="MP4" draw:layer="backgroundobjects" svg:width="6.298cm" svg:height="0.839cm" svg:x="19.768cm" svg:y="14.595cm" presentation:class="page-number">
        <draw:text-box>
          <text:p text:style-name="MP10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25.19cm" svg:height="9.132cm" svg:x="1.399cm" svg:y="3.685cm" presentation:class="outline" presentation:placeholder="true">
        <draw:text-box/>
      </draw:frame>
      <presentation:notes style:page-layout-name="PM0">
        <draw:page-thumbnail draw:name="Slide Image Placeholder 1" presentation:style-name="Master1-Layout2-obj-Title-and-Content-title" draw:layer="backgroundobjects" svg:width="18.624cm" svg:height="10.476cm" svg:x="1.482cm" svg:y="2.123cm" presentation:class="page"/>
        <draw:frame draw:name="Notes Placeholder 2" presentation:style-name="Mpr19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0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0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21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21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22" draw:text-style-name="MP4" draw:layer="backgroundobjects" svg:width="24.142cm" svg:height="6.55cm" svg:x="1.91cm" svg:y="3.926cm" presentation:class="title">
        <draw:text-box>
          <text:p text:style-name="MP3"><text:span text:style-name="MT9">Click to edit Master title style</text:span></text:p>
        </draw:text-box>
      </draw:frame>
      <draw:frame draw:name="Text Placeholder 2" presentation:style-name="Mpr23" draw:text-style-name="MP4" draw:layer="backgroundobjects" svg:width="24.142cm" svg:height="3.445cm" svg:x="1.91cm" svg:y="10.538cm" presentation:class="outline">
        <draw:text-box>
          <text:list text:style-name="ML2">
            <text:list-item>
              <text:p text:style-name="MP13"><text:span text:style-name="MT4">Click to edit Master text styles</text:span></text:p>
            </text:list-item>
          </text:list>
        </draw:text-box>
      </draw:frame>
      <draw:frame draw:name="Date Placeholder 3" presentation:style-name="Mpr24" draw:text-style-name="MP4" draw:layer="backgroundobjects" svg:width="6.298cm" svg:height="0.839cm" svg:x="1.924cm" svg:y="14.595cm" presentation:class="date-time">
        <draw:text-box>
          <text:p/>
        </draw:text-box>
      </draw:frame>
      <draw:frame draw:name="Footer Placeholder 4" presentation:style-name="Mpr25" draw:text-style-name="MP4" draw:layer="backgroundobjects" svg:width="9.447cm" svg:height="0.839cm" svg:x="9.272cm" svg:y="14.595cm" presentation:class="footer">
        <draw:text-box>
          <text:p/>
        </draw:text-box>
      </draw:frame>
      <draw:frame draw:name="Slide Number Placeholder 5" presentation:style-name="Mpr24" draw:text-style-name="MP4" draw:layer="backgroundobjects" svg:width="6.298cm" svg:height="0.839cm" svg:x="19.768cm" svg:y="14.595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8.624cm" svg:height="10.476cm" svg:x="1.482cm" svg:y="2.123cm" presentation:class="page"/>
        <draw:frame draw:name="Notes Placeholder 2" presentation:style-name="Mpr26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7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7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28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28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29" draw:text-style-name="MP4" draw:layer="backgroundobjects" svg:width="24.142cm" svg:height="3.044cm" svg:x="1.924cm" svg:y="0.838cm" presentation:class="title">
        <draw:text-box>
          <text:p text:style-name="MP3"><text:span text:style-name="MT2">Click to edit Master title style</text:span></text:p>
        </draw:text-box>
      </draw:frame>
      <draw:frame draw:name="Content Placeholder 2" presentation:style-name="Mpr30" draw:text-style-name="MP4" draw:layer="backgroundobjects" svg:width="11.896cm" svg:height="9.991cm" svg:x="1.924cm" svg:y="4.191cm" presentation:class="title">
        <draw:text-box>
          <text:list text:style-name="ML4">
            <text:list-item>
              <text:p text:style-name="MP5"><text:span text:style-name="MT3">Click to edit Master text styles</text:span></text:p>
              <text:list>
                <text:list-item>
                  <text:p text:style-name="MP6"><text:span text:style-name="MT4">Second level</text:span></text:p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30" draw:text-style-name="MP4" draw:layer="backgroundobjects" svg:width="11.896cm" svg:height="9.991cm" svg:x="14.17cm" svg:y="4.191cm" presentation:class="title">
        <draw:text-box>
          <text:list text:style-name="ML4">
            <text:list-item>
              <text:p text:style-name="MP5"><text:span text:style-name="MT3">Click to edit Master text styles</text:span></text:p>
              <text:list>
                <text:list-item>
                  <text:p text:style-name="MP6"><text:span text:style-name="MT4">Second level</text:span></text:p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31" draw:text-style-name="MP4" draw:layer="backgroundobjects" svg:width="6.298cm" svg:height="0.839cm" svg:x="1.924cm" svg:y="14.595cm" presentation:class="date-time">
        <draw:text-box>
          <text:p/>
        </draw:text-box>
      </draw:frame>
      <draw:frame draw:name="Footer Placeholder 5" presentation:style-name="Mpr32" draw:text-style-name="MP4" draw:layer="backgroundobjects" svg:width="9.447cm" svg:height="0.839cm" svg:x="9.272cm" svg:y="14.595cm" presentation:class="footer">
        <draw:text-box>
          <text:p/>
        </draw:text-box>
      </draw:frame>
      <draw:frame draw:name="Slide Number Placeholder 6" presentation:style-name="Mpr31" draw:text-style-name="MP4" draw:layer="backgroundobjects" svg:width="6.298cm" svg:height="0.839cm" svg:x="19.768cm" svg:y="14.595cm" presentation:class="page-number">
        <draw:text-box>
          <text:p text:style-name="MP10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25.19cm" svg:height="9.132cm" svg:x="1.399cm" svg:y="3.685cm" presentation:class="outline" presentation:placeholder="true">
        <draw:text-box/>
      </draw:frame>
      <presentation:notes style:page-layout-name="PM0">
        <draw:page-thumbnail draw:name="Slide Image Placeholder 1" presentation:style-name="Master1-Layout4-twoObj-Two-Content-title" draw:layer="backgroundobjects" svg:width="18.624cm" svg:height="10.476cm" svg:x="1.482cm" svg:y="2.123cm" presentation:class="page"/>
        <draw:frame draw:name="Notes Placeholder 2" presentation:style-name="Mpr33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4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4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5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5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36" draw:text-style-name="MP4" draw:layer="backgroundobjects" svg:width="24.142cm" svg:height="3.044cm" svg:x="1.928cm" svg:y="0.838cm" presentation:class="title">
        <draw:text-box>
          <text:p text:style-name="MP3"><text:span text:style-name="MT2">Click to edit Master title style</text:span></text:p>
        </draw:text-box>
      </draw:frame>
      <draw:frame draw:name="Text Placeholder 2" presentation:style-name="Mpr37" draw:text-style-name="MP4" draw:layer="backgroundobjects" svg:width="11.841cm" svg:height="1.892cm" svg:x="1.928cm" svg:y="3.86cm" presentation:class="outline">
        <draw:text-box>
          <text:list text:style-name="ML2">
            <text:list-item>
              <text:p text:style-name="MP13"><text:span text:style-name="MT10">Click to edit Master text styles</text:span></text:p>
            </text:list-item>
          </text:list>
        </draw:text-box>
      </draw:frame>
      <draw:frame draw:name="Content Placeholder 3" presentation:style-name="Mpr38" draw:text-style-name="MP4" draw:layer="backgroundobjects" svg:width="11.841cm" svg:height="8.461cm" svg:x="1.928cm" svg:y="5.752cm" presentation:class="title">
        <draw:text-box>
          <text:list text:style-name="ML4">
            <text:list-item>
              <text:p text:style-name="MP5"><text:span text:style-name="MT3">Click to edit Master text styles</text:span></text:p>
              <text:list>
                <text:list-item>
                  <text:p text:style-name="MP6"><text:span text:style-name="MT4">Second level</text:span></text:p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7" draw:text-style-name="MP4" draw:layer="backgroundobjects" svg:width="11.899cm" svg:height="1.892cm" svg:x="14.17cm" svg:y="3.86cm" presentation:class="outline">
        <draw:text-box>
          <text:list text:style-name="ML5">
            <text:list-item>
              <text:p text:style-name="MP13"><text:span text:style-name="MT10">Click to edit Master text styles</text:span></text:p>
            </text:list-item>
          </text:list>
        </draw:text-box>
      </draw:frame>
      <draw:frame draw:name="Content Placeholder 5" presentation:style-name="Mpr38" draw:text-style-name="MP4" draw:layer="backgroundobjects" svg:width="11.899cm" svg:height="8.461cm" svg:x="14.17cm" svg:y="5.752cm" presentation:class="title">
        <draw:text-box>
          <text:list text:style-name="ML4">
            <text:list-item>
              <text:p text:style-name="MP5"><text:span text:style-name="MT3">Click to edit Master text styles</text:span></text:p>
              <text:list>
                <text:list-item>
                  <text:p text:style-name="MP6"><text:span text:style-name="MT4">Second level</text:span></text:p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9" draw:text-style-name="MP4" draw:layer="backgroundobjects" svg:width="6.298cm" svg:height="0.839cm" svg:x="1.924cm" svg:y="14.595cm" presentation:class="date-time">
        <draw:text-box>
          <text:p/>
        </draw:text-box>
      </draw:frame>
      <draw:frame draw:name="Footer Placeholder 7" presentation:style-name="Mpr40" draw:text-style-name="MP4" draw:layer="backgroundobjects" svg:width="9.447cm" svg:height="0.839cm" svg:x="9.272cm" svg:y="14.595cm" presentation:class="footer">
        <draw:text-box>
          <text:p/>
        </draw:text-box>
      </draw:frame>
      <draw:frame draw:name="Slide Number Placeholder 8" presentation:style-name="Mpr39" draw:text-style-name="MP4" draw:layer="backgroundobjects" svg:width="6.298cm" svg:height="0.839cm" svg:x="19.768cm" svg:y="14.595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8.624cm" svg:height="10.476cm" svg:x="1.482cm" svg:y="2.123cm" presentation:class="page"/>
        <draw:frame draw:name="Notes Placeholder 2" presentation:style-name="Mpr41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42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42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3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3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44" draw:text-style-name="MP4" draw:layer="backgroundobjects" svg:width="24.142cm" svg:height="3.044cm" svg:x="1.924cm" svg:y="0.838cm" presentation:class="title">
        <draw:text-box>
          <text:p text:style-name="MP3"><text:span text:style-name="MT2">Click to edit Master title style</text:span></text:p>
        </draw:text-box>
      </draw:frame>
      <draw:frame draw:name="Date Placeholder 2" presentation:style-name="Mpr45" draw:text-style-name="MP4" draw:layer="backgroundobjects" svg:width="6.298cm" svg:height="0.839cm" svg:x="1.924cm" svg:y="14.595cm" presentation:class="date-time">
        <draw:text-box>
          <text:p/>
        </draw:text-box>
      </draw:frame>
      <draw:frame draw:name="Footer Placeholder 3" presentation:style-name="Mpr46" draw:text-style-name="MP4" draw:layer="backgroundobjects" svg:width="9.447cm" svg:height="0.839cm" svg:x="9.272cm" svg:y="14.595cm" presentation:class="footer">
        <draw:text-box>
          <text:p/>
        </draw:text-box>
      </draw:frame>
      <draw:frame draw:name="Slide Number Placeholder 4" presentation:style-name="Mpr45" draw:text-style-name="MP4" draw:layer="backgroundobjects" svg:width="6.298cm" svg:height="0.839cm" svg:x="19.768cm" svg:y="14.595cm" presentation:class="page-number">
        <draw:text-box>
          <text:p text:style-name="MP10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25.19cm" svg:height="9.132cm" svg:x="1.399cm" svg:y="3.685cm" presentation:class="outline" presentation:placeholder="true">
        <draw:text-box/>
      </draw:frame>
      <presentation:notes style:page-layout-name="PM0">
        <draw:page-thumbnail draw:name="Slide Image Placeholder 1" presentation:style-name="Master1-Layout6-titleOnly-Title-Only-title" draw:layer="backgroundobjects" svg:width="18.624cm" svg:height="10.476cm" svg:x="1.482cm" svg:y="2.123cm" presentation:class="page"/>
        <draw:frame draw:name="Notes Placeholder 2" presentation:style-name="Mpr47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48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48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9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9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Date Placeholder 1" presentation:style-name="Mpr50" draw:text-style-name="MP4" draw:layer="backgroundobjects" svg:width="6.298cm" svg:height="0.839cm" svg:x="1.924cm" svg:y="14.595cm" presentation:class="date-time">
        <draw:text-box>
          <text:p/>
        </draw:text-box>
      </draw:frame>
      <draw:frame draw:name="Footer Placeholder 2" presentation:style-name="Mpr51" draw:text-style-name="MP4" draw:layer="backgroundobjects" svg:width="9.447cm" svg:height="0.839cm" svg:x="9.272cm" svg:y="14.595cm" presentation:class="footer">
        <draw:text-box>
          <text:p/>
        </draw:text-box>
      </draw:frame>
      <draw:frame draw:name="Slide Number Placeholder 3" presentation:style-name="Mpr50" draw:text-style-name="MP4" draw:layer="backgroundobjects" svg:width="6.298cm" svg:height="0.839cm" svg:x="19.768cm" svg:y="14.595cm" presentation:class="page-number">
        <draw:text-box>
          <text:p text:style-name="MP10"><text:span text:style-name="MT7"><text:page-number>&lt;number&gt;</text:page-number></text:span></text:p>
        </draw:text-box>
      </draw:frame>
      <draw:frame presentation:style-name="Master1-Layout7-blank-Blank-title" draw:layer="backgroundobjects" svg:width="25.19cm" svg:height="2.628cm" svg:x="1.399cm" svg:y="0.628cm" presentation:class="title" presentation:placeholder="true">
        <draw:text-box/>
      </draw:frame>
      <draw:frame presentation:style-name="Master1-Layout7-blank-Blank-outline1" draw:layer="backgroundobjects" svg:width="25.19cm" svg:height="9.132cm" svg:x="1.399cm" svg:y="3.685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8.624cm" svg:height="10.476cm" svg:x="1.482cm" svg:y="2.123cm" presentation:class="page"/>
        <draw:frame draw:name="Notes Placeholder 2" presentation:style-name="Mpr52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53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3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54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54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55" draw:text-style-name="MP4" draw:layer="backgroundobjects" svg:width="9.027cm" svg:height="3.674cm" svg:x="1.928cm" svg:y="1.049cm" presentation:class="title">
        <draw:text-box>
          <text:p text:style-name="MP3"><text:span text:style-name="MT11">Click to edit Master title style</text:span></text:p>
        </draw:text-box>
      </draw:frame>
      <draw:frame draw:name="Content Placeholder 2" presentation:style-name="Mpr56" draw:text-style-name="MP4" draw:layer="backgroundobjects" svg:width="14.17cm" svg:height="11.191cm" svg:x="11.899cm" svg:y="2.267cm" presentation:class="title">
        <draw:text-box>
          <text:list text:style-name="ML4">
            <text:list-item>
              <text:p text:style-name="MP5"><text:span text:style-name="MT12">Click to edit Master text styles</text:span></text:p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57" draw:text-style-name="MP4" draw:layer="backgroundobjects" svg:width="9.027cm" svg:height="8.752cm" svg:x="1.928cm" svg:y="4.723cm" presentation:class="outline">
        <draw:text-box>
          <text:list text:style-name="ML2">
            <text:list-item>
              <text:p text:style-name="MP13"><text:span text:style-name="MT13">Click to edit Master text styles</text:span></text:p>
            </text:list-item>
          </text:list>
        </draw:text-box>
      </draw:frame>
      <draw:frame draw:name="Date Placeholder 4" presentation:style-name="Mpr58" draw:text-style-name="MP4" draw:layer="backgroundobjects" svg:width="6.298cm" svg:height="0.839cm" svg:x="1.924cm" svg:y="14.595cm" presentation:class="date-time">
        <draw:text-box>
          <text:p/>
        </draw:text-box>
      </draw:frame>
      <draw:frame draw:name="Footer Placeholder 5" presentation:style-name="Mpr59" draw:text-style-name="MP4" draw:layer="backgroundobjects" svg:width="9.447cm" svg:height="0.839cm" svg:x="9.272cm" svg:y="14.595cm" presentation:class="footer">
        <draw:text-box>
          <text:p/>
        </draw:text-box>
      </draw:frame>
      <draw:frame draw:name="Slide Number Placeholder 6" presentation:style-name="Mpr58" draw:text-style-name="MP4" draw:layer="backgroundobjects" svg:width="6.298cm" svg:height="0.839cm" svg:x="19.768cm" svg:y="14.595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8.624cm" svg:height="10.476cm" svg:x="1.482cm" svg:y="2.123cm" presentation:class="page"/>
        <draw:frame draw:name="Notes Placeholder 2" presentation:style-name="Mpr60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61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61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2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2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63" draw:text-style-name="MP4" draw:layer="backgroundobjects" svg:width="9.027cm" svg:height="3.674cm" svg:x="1.928cm" svg:y="1.049cm" presentation:class="title">
        <draw:text-box>
          <text:p text:style-name="MP3"><text:span text:style-name="MT11">Click to edit Master title style</text:span></text:p>
        </draw:text-box>
      </draw:frame>
      <draw:frame draw:name="Picture Placeholder 2" presentation:style-name="Mpr64" draw:text-style-name="MP4" draw:layer="backgroundobjects" svg:width="14.17cm" svg:height="11.191cm" svg:x="11.899cm" svg:y="2.267cm" presentation:class="title">
        <draw:text-box>
          <text:p text:style-name="MP13"><text:span text:style-name="MT12">Click icon to add picture</text:span></text:p>
        </draw:text-box>
      </draw:frame>
      <draw:frame draw:name="Text Placeholder 3" presentation:style-name="Mpr65" draw:text-style-name="MP4" draw:layer="backgroundobjects" svg:width="9.027cm" svg:height="8.752cm" svg:x="1.928cm" svg:y="4.723cm" presentation:class="outline">
        <draw:text-box>
          <text:list text:style-name="ML2">
            <text:list-item>
              <text:p text:style-name="MP13"><text:span text:style-name="MT13">Click to edit Master text styles</text:span></text:p>
            </text:list-item>
          </text:list>
        </draw:text-box>
      </draw:frame>
      <draw:frame draw:name="Date Placeholder 4" presentation:style-name="Mpr66" draw:text-style-name="MP4" draw:layer="backgroundobjects" svg:width="6.298cm" svg:height="0.839cm" svg:x="1.924cm" svg:y="14.595cm" presentation:class="date-time">
        <draw:text-box>
          <text:p/>
        </draw:text-box>
      </draw:frame>
      <draw:frame draw:name="Footer Placeholder 5" presentation:style-name="Mpr67" draw:text-style-name="MP4" draw:layer="backgroundobjects" svg:width="9.447cm" svg:height="0.839cm" svg:x="9.272cm" svg:y="14.595cm" presentation:class="footer">
        <draw:text-box>
          <text:p/>
        </draw:text-box>
      </draw:frame>
      <draw:frame draw:name="Slide Number Placeholder 6" presentation:style-name="Mpr66" draw:text-style-name="MP4" draw:layer="backgroundobjects" svg:width="6.298cm" svg:height="0.839cm" svg:x="19.768cm" svg:y="14.595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8.624cm" svg:height="10.476cm" svg:x="1.482cm" svg:y="2.123cm" presentation:class="page"/>
        <draw:frame draw:name="Notes Placeholder 2" presentation:style-name="Mpr68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69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69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70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70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71" draw:text-style-name="MP4" draw:layer="backgroundobjects" svg:width="24.142cm" svg:height="3.044cm" svg:x="1.924cm" svg:y="0.838cm" presentation:class="title">
        <draw:text-box>
          <text:p text:style-name="MP3"><text:span text:style-name="MT2">Click to edit Master title style</text:span></text:p>
        </draw:text-box>
      </draw:frame>
      <draw:frame draw:name="Vertical Text Placeholder 2" presentation:style-name="Mpr72" draw:text-style-name="MP4" draw:layer="backgroundobjects" svg:width="24.142cm" svg:height="9.991cm" svg:x="1.924cm" svg:y="4.191cm" presentation:class="outline">
        <draw:text-box>
          <text:list text:style-name="ML2">
            <text:list-item>
              <text:p text:style-name="MP5"><text:span text:style-name="MT3">Click to edit Master text styles</text:span></text:p>
              <text:list>
                <text:list-item>
                  <text:p text:style-name="MP6"><text:span text:style-name="MT4">Second level</text:span></text:p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4" draw:layer="backgroundobjects" svg:width="6.298cm" svg:height="0.839cm" svg:x="1.924cm" svg:y="14.595cm" presentation:class="date-time">
        <draw:text-box>
          <text:p/>
        </draw:text-box>
      </draw:frame>
      <draw:frame draw:name="Footer Placeholder 4" presentation:style-name="Mpr74" draw:text-style-name="MP4" draw:layer="backgroundobjects" svg:width="9.447cm" svg:height="0.839cm" svg:x="9.272cm" svg:y="14.595cm" presentation:class="footer">
        <draw:text-box>
          <text:p/>
        </draw:text-box>
      </draw:frame>
      <draw:frame draw:name="Slide Number Placeholder 5" presentation:style-name="Mpr73" draw:text-style-name="MP4" draw:layer="backgroundobjects" svg:width="6.298cm" svg:height="0.839cm" svg:x="19.768cm" svg:y="14.595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8.624cm" svg:height="10.476cm" svg:x="1.482cm" svg:y="2.123cm" presentation:class="page"/>
        <draw:frame draw:name="Notes Placeholder 2" presentation:style-name="Mpr75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76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76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77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77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Vertical Title 1" presentation:style-name="Mpr78" draw:text-style-name="MP4" draw:layer="backgroundobjects" svg:width="6.036cm" svg:height="13.346cm" svg:x="20.031cm" svg:y="0.838cm" presentation:class="title">
        <draw:text-box>
          <text:p text:style-name="MP3"><text:span text:style-name="MT2">Click to edit Master title style</text:span></text:p>
        </draw:text-box>
      </draw:frame>
      <draw:frame draw:name="Vertical Text Placeholder 2" presentation:style-name="Mpr79" draw:text-style-name="MP4" draw:layer="backgroundobjects" svg:width="17.757cm" svg:height="13.346cm" svg:x="1.924cm" svg:y="0.838cm" presentation:class="outline">
        <draw:text-box>
          <text:list text:style-name="ML2">
            <text:list-item>
              <text:p text:style-name="MP5"><text:span text:style-name="MT3">Click to edit Master text styles</text:span></text:p>
              <text:list>
                <text:list-item>
                  <text:p text:style-name="MP6"><text:span text:style-name="MT4">Second level</text:span></text:p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4" draw:layer="backgroundobjects" svg:width="6.298cm" svg:height="0.839cm" svg:x="1.924cm" svg:y="14.595cm" presentation:class="date-time">
        <draw:text-box>
          <text:p/>
        </draw:text-box>
      </draw:frame>
      <draw:frame draw:name="Footer Placeholder 4" presentation:style-name="Mpr81" draw:text-style-name="MP4" draw:layer="backgroundobjects" svg:width="9.447cm" svg:height="0.839cm" svg:x="9.272cm" svg:y="14.595cm" presentation:class="footer">
        <draw:text-box>
          <text:p/>
        </draw:text-box>
      </draw:frame>
      <draw:frame draw:name="Slide Number Placeholder 5" presentation:style-name="Mpr80" draw:text-style-name="MP4" draw:layer="backgroundobjects" svg:width="6.298cm" svg:height="0.839cm" svg:x="19.768cm" svg:y="14.595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8.624cm" svg:height="10.476cm" svg:x="1.482cm" svg:y="2.123cm" presentation:class="page"/>
        <draw:frame draw:name="Notes Placeholder 2" presentation:style-name="Mpr82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83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83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84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84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2-blank-1_5f_5f_5f_Blank" style:display-name="Master1-Layout12-blank-1_5f_Blank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Date Placeholder 1" presentation:style-name="Mpr85" draw:text-style-name="MP4" draw:layer="backgroundobjects" svg:width="6.298cm" svg:height="0.839cm" svg:x="1.924cm" svg:y="14.595cm" presentation:class="date-time">
        <draw:text-box>
          <text:p/>
        </draw:text-box>
      </draw:frame>
      <draw:frame draw:name="Footer Placeholder 2" presentation:style-name="Mpr86" draw:text-style-name="MP4" draw:layer="backgroundobjects" svg:width="9.447cm" svg:height="0.839cm" svg:x="9.272cm" svg:y="14.595cm" presentation:class="footer">
        <draw:text-box>
          <text:p/>
        </draw:text-box>
      </draw:frame>
      <draw:frame draw:name="Slide Number Placeholder 3" presentation:style-name="Mpr85" draw:text-style-name="MP4" draw:layer="backgroundobjects" svg:width="6.298cm" svg:height="0.839cm" svg:x="19.768cm" svg:y="14.595cm" presentation:class="page-number">
        <draw:text-box>
          <text:p text:style-name="MP10"><text:span text:style-name="MT7"><text:page-number>&lt;number&gt;</text:page-number></text:span></text:p>
        </draw:text-box>
      </draw:frame>
      <draw:frame draw:name="Title 4" presentation:style-name="Mpr87" draw:text-style-name="MP4" draw:layer="backgroundobjects" svg:width="25.19cm" svg:height="2.628cm" svg:x="1.399cm" svg:y="0.627cm" presentation:class="title">
        <draw:text-box>
          <text:p/>
        </draw:text-box>
      </draw:frame>
      <draw:frame draw:name="Text Placeholder 5" presentation:style-name="Mpr88" draw:text-style-name="MP4" draw:layer="backgroundobjects" svg:width="25.19cm" svg:height="9.133cm" svg:x="1.399cm" svg:y="3.684cm" presentation:class="outline">
        <draw:text-box>
          <text:p/>
        </draw:text-box>
      </draw:frame>
      <presentation:notes style:page-layout-name="PM0">
        <draw:page-thumbnail draw:name="Slide Image Placeholder 1" presentation:style-name="Master1-Layout12-blank-1_5f_5f_5f_Blank-title" draw:layer="backgroundobjects" svg:width="18.624cm" svg:height="10.476cm" svg:x="1.482cm" svg:y="2.123cm" presentation:class="page"/>
        <draw:frame draw:name="Notes Placeholder 2" presentation:style-name="Mpr89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90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90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91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91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24.2.3.2$Windows_x86 LibreOffice_project/433d9c2ded56988e8a90e6b2e771ee4e6a5ab2ba</meta:generator>
    <dc:title>TRYOUT – Psalm 30: 1, 2</dc:title>
    <meta:creation-date>2020-06-13T12:03:09Z</meta:creation-date>
    <dc:date>2025-03-24T11:27:42.805000000</dc:date>
    <meta:editing-cycles>545</meta:editing-cycles>
    <meta:editing-duration>PT7H19M19S</meta:editing-duration>
    <meta:document-statistic meta:object-count="166"/>
    <meta:template xlink:type="simple" xlink:actuate="onRequest" xlink:title="" xlink:href="./Office%20Theme"/>
  </office:meta>
</office:document-meta>
</file>